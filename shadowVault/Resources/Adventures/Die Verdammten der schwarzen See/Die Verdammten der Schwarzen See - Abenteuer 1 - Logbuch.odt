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Script" svg:font-family="'Segoe Script'" style:font-family-generic="script" style:font-pitch="variable"/>
  </office:font-face-decls>
  <office:automatic-styles>
    <style:style style:name="P1" style:family="paragraph" style:parent-style-name="Text_20_body">
      <style:text-properties style:font-name="Segoe Script"/>
    </style:style>
    <style:style style:name="P2" style:family="paragraph" style:parent-style-name="Text_20_body">
      <style:text-properties style:font-name="Segoe Script" officeooo:rsid="0014e56a" officeooo:paragraph-rsid="0014e56a"/>
    </style:style>
    <style:style style:name="P3" style:family="paragraph" style:parent-style-name="Text_20_body">
      <style:text-properties officeooo:paragraph-rsid="00151925"/>
    </style:style>
    <style:style style:name="P4" style:family="paragraph" style:parent-style-name="Text_20_body">
      <style:text-properties style:font-name="Segoe Script" officeooo:paragraph-rsid="0014e56a"/>
    </style:style>
    <style:style style:name="P5" style:family="paragraph" style:parent-style-name="Standard">
      <style:text-properties style:font-name="Segoe Script"/>
    </style:style>
    <style:style style:name="T1" style:family="text">
      <style:text-properties style:font-name="Segoe Script"/>
    </style:style>
    <style:style style:name="T2" style:family="text">
      <style:text-properties style:font-name="Segoe Script" officeooo:rsid="0014e56a"/>
    </style:style>
    <style:style style:name="T3" style:family="text">
      <style:text-properties officeooo:rsid="001713c5"/>
    </style:style>
    <style:style style:name="T4" style:family="text">
      <style:text-properties officeooo:rsid="0014e56a"/>
    </style:style>
    <style:style style:name="T5" style:family="text">
      <style:text-properties style:font-name="Segoe Script" officeooo:rsid="001519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T1">Tag </text:span></text:span><text:span text:style-name="Strong_20_Emphasis"><text:span text:style-name="T2">1</text:span></text:span><text:span text:style-name="Strong_20_Emphasis"><text:span text:style-name="T1"> auf der Insel</text:span></text:span></text:p>
      <text:p text:style-name="P1">Wir haben endlich Land unter den Füßen. Eine Insel, die nicht auf unseren Karten verzeichnet ist, aber voller Versprechen.<text:line-break/>Der Dschungel ist dicht wie ein Bollwerk, die Luft schwer wie ein nasser Mantel. Die Männer fluchen über die Hitze, doch ich spüre… etwas.<text:line-break/>Etwas, das uns ruft.</text:p>
      <text:p text:style-name="P1">Die Eingeborenen sollen im Osten leben, ein kleiner Stamm. Wilde, sagen die Männer. Aber Wilde kennen ihre Heimat.<text:line-break/>Und diese Insel hat Geheimnisse, die ich entschlüsseln werde — mit oder ohne ihre Hilfe.</text:p>
      <text:p text:style-name="P2">Wir werden zuerst ein Lagen aufschlagen bevor wir das Dorf suchen.</text:p>
      <text:p text:style-name="P3"><text:span text:style-name="Strong_20_Emphasis"><text:span text:style-name="T1">Tag 5 auf der Insel</text:span></text:span></text:p>
      <text:p text:style-name="P1">Wir haben das Dorf gefunden.<text:line-break/>Ein armseliger Haufen Hütten, aber in ihrer Mitte steht ein Schrein, der älter ist als alles, was Menschenhände erbauen könnten.<text:line-break/><text:span text:style-name="T3">Die Eingeborenen haben uns von Schrein fern gehalten. Ich will wissen was sie vor uns verbergen.</text:span></text:p>
      <text:p text:style-name="P3"><text:span text:style-name="Strong_20_Emphasis"><text:span text:style-name="T1">Tag 6 auf der Insel</text:span></text:span></text:p>
      <text:p text:style-name="P1">Die Eingeborenen wollten uns nicht helfen.<text:line-break/>Sie sprachen in ihrer kratzigen Sprache, warnten uns mit wilden Gesten.<text:line-break/>Sie sagten, der „Hüter“ würde uns verschlingen, wenn wir weitergingen.<text:line-break/>Unsinn.<text:line-break/>Wir brauchen Antworten, und sie haben sie.<text:line-break/>Morgen im Morgengrauen werden wir ihr Dorf stürmen.<text:line-break/>Ich dulde keine Hindernisse.</text:p>
      <text:p text:style-name="P3"><text:span text:style-name="Strong_20_Emphasis"><text:span text:style-name="T1">Tag 7 auf der Insel</text:span></text:span></text:p>
      <text:p text:style-name="P4">Das Dorf ist gefallen.<text:line-break/>Doch es war kein Kampf — eher ein Massaker.<text:line-break/>Sie flohen in den Dschungel, <text:span text:style-name="T4">schreiend</text:span> wie Tiere.</text:p>
      <text:p text:style-name="P4"><text:soft-page-break/><text:span text:style-name="T4">Wir haben </text:span><text:span text:style-name="T3">den Schrein untersucht</text:span><text:span text:style-name="T4">.</text:span><text:line-break/>Er zeigt eine Abfolge von Bildern:<text:line-break/>Ein Splitter, ruhelos.<text:line-break/>Eine Schale, die zerbricht.<text:line-break/>Und eine Perle, die seinen Platz einnimmt.</text:p>
      <text:p text:style-name="P1">Ich verstehe es noch nicht ganz.<text:line-break/>Aber ich werde es.</text:p>
      <text:p text:style-name="P3"><text:span text:style-name="Strong_20_Emphasis"><text:span text:style-name="T1">Tag 9 auf der Insel</text:span></text:span></text:p>
      <text:p text:style-name="P1">Wir haben die Lagune entdeckt, <text:span text:style-name="T4">nördlich unseres Lagers.</text:span><text:line-break/>Ein Ort so still, dass selbst die Wellen schweigen.<text:line-break/>Unter der Oberfläche schwimmen Fische aus Licht — Geisterfische, sagen die Männer.<text:line-break/>Ich sah sie selbst: durchsichtig, schimmernd, als wären sie aus Mondschein geformt.</text:p>
      <text:p text:style-name="P1">Am Grund glimmt etwas.<text:line-break/>Ein sanftes, bläuliches Leuchten, das im Sand pulsiert.<text:line-break/>Ich glaube, es sind Perlen.<text:line-break/>Vielleicht die Perle, die der Schrein meint.<text:line-break/>Vielleicht der Schlüssel.</text:p>
      <text:p text:style-name="P3"><text:span text:style-name="Strong_20_Emphasis"><text:span text:style-name="T1">Tag 10 auf der Insel</text:span></text:span></text:p>
      <text:p text:style-name="P1">Zwei Männer sind nicht zurückgekehrt.<text:line-break/>Die anderen behaupten, kalte Hände hätten sie nach unten gezogen.<text:line-break/>Unsinn.<text:line-break/>Sie sind ertrunken, weil sie schwach waren.</text:p>
      <text:p text:style-name="Text_20_body"><text:span text:style-name="T1">Doch die Perle, die sie brachten…<text:line-break/>Sie ist warm.<text:line-break/>Lebendig.<text:line-break/>Wenn ich sie halte, spüre ich ein leises Pochen, als würde sie mit meinem Herzschlag sprechen.<text:line-break/>Ich glaube, sie ist wichtig.<text:line-break/>Ich glaube, sie ist </text:span><text:span text:style-name="Emphasis"><text:span text:style-name="T1">notwendig</text:span></text:span><text:span text:style-name="T1">.</text:span></text:p>
      <text:p text:style-name="P3"><text:soft-page-break/><text:span text:style-name="Strong_20_Emphasis"><text:span text:style-name="T1">Tag 1</text:span></text:span><text:span text:style-name="Strong_20_Emphasis"><text:span text:style-name="T2">1 auf der Insel</text:span></text:span></text:p>
      <text:p text:style-name="P1">Wir haben Spuren gefunden.<text:line-break/>Krallen, tief in den Fels gerissen.<text:line-break/>Ein Geruch wie nasser Tod liegt in der Luft.<text:line-break/>Die Männer wollen zurück zum Schiff.<text:line-break/>Sie zittern.<text:line-break/>Sie beten.</text:p>
      <text:p text:style-name="P1">Ich aber fühle mich stärker.<text:line-break/>Die Insel spricht zu mir.<text:line-break/>Sie will, dass ich weitermache.</text:p>
      <text:p text:style-name="P3"><text:span text:style-name="Strong_20_Emphasis"><text:span text:style-name="T1">Tag 1</text:span></text:span><text:span text:style-name="Strong_20_Emphasis"><text:span text:style-name="T2">2 auf der Insel</text:span></text:span></text:p>
      <text:p text:style-name="P1">Wir haben den Schädeltempel erreicht.<text:line-break/>Er liegt im Norden, genau wie der Schrein es zeigte.<text:line-break/>Ein Fels, geformt wie ein Schädel, mit einem Eingang wie ein gähnender Rachen.<text:line-break/>Ein bläuliches Licht pulsiert tief darin.<text:line-break/>Es ruft mich.</text:p>
      <text:p text:style-name="P1">Die Männer weigern sich weiterzugehen.<text:line-break/>Feiglinge.<text:line-break/>Ich werde <text:span text:style-name="T4">morgen</text:span> allein hinabsteigen.<text:line-break/>Mit der Perle.<text:line-break/>Mit Mut.<text:line-break/>Mit Schicksal.</text:p>
      <text:p text:style-name="P3"><text:span text:style-name="Strong_20_Emphasis"><text:span text:style-name="T2">Tag 13 auf der Insel</text:span></text:span></text:p>
      <text:p text:style-name="Text_20_body"><text:span text:style-name="T1">Etwas bewegt sich im Tempel.<text:line-break/>Etwas Altes.<text:line-break/>Etwas, das den Splitter bewacht.<text:line-break/>Ich höre es atmen.<text:line-break/>Ich höre es </text:span><text:span text:style-name="Emphasis"><text:span text:style-name="T1">denken</text:span></text:span><text:span text:style-name="T1">.</text:span></text:p>
      <text:p text:style-name="P1"><text:soft-page-break/>Ich werde den Splitter nehmen.<text:line-break/>Er gehört mir.<text:line-break/>Mir…<text:line-break/>…und der Tiefe.</text:p>
      <text:p text:style-name="Text_20_body"><text:span text:style-name="Emphasis"><text:span text:style-name="T1">(Der Rest der Seite ist leer. Am Rand klebt getrocknetes Salz </text:span></text:span><text:span text:style-name="Emphasis"><text:span text:style-name="T5">und</text:span></text:span><text:span text:style-name="Emphasis"><text:span text:style-name="T1"> Blut. Die Handschrift endet abrupt.)</text:span>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Script" svg:font-family="'Segoe Script'" style:font-family-generic="script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7T11:19:47.300130300</meta:creation-date>
    <dc:date>2026-01-30T17:12:14.200667100</dc:date>
    <meta:editing-duration>PT12M2S</meta:editing-duration>
    <meta:editing-cycles>3</meta:editing-cycles>
    <meta:generator>LibreOffice/25.2.7.2$Windows_X86_64 LibreOffice_project/5cbfd1ab6520636bb5f7b99185aa69bd7456825d</meta:generator>
    <meta:print-date>2026-01-30T17:11:04.933482500</meta:print-date>
    <meta:document-statistic meta:table-count="0" meta:image-count="0" meta:object-count="0" meta:page-count="4" meta:paragraph-count="28" meta:word-count="552" meta:character-count="3330" meta:non-whitespace-character-count="2803"/>
  </office:meta>
</office:document-meta>
</file>