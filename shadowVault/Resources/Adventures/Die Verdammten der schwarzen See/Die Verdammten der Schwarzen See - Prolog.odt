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f70d6" officeooo:paragraph-rsid="001f70d6"/>
    </style:style>
    <style:style style:name="P2" style:family="paragraph" style:parent-style-name="Text_20_body">
      <style:text-properties officeooo:rsid="001f70d6"/>
    </style:style>
    <style:style style:name="P3" style:family="paragraph" style:parent-style-name="Text_20_body">
      <style:text-properties officeooo:rsid="001f70d6" officeooo:paragraph-rsid="00215e40"/>
    </style:style>
    <style:style style:name="P4" style:family="paragraph" style:parent-style-name="Text_20_body">
      <style:text-properties officeooo:rsid="00215e40" officeooo:paragraph-rsid="00215e40"/>
    </style:style>
    <style:style style:name="P5" style:family="paragraph" style:parent-style-name="Standard">
      <style:text-properties officeooo:rsid="001f70d6" officeooo:paragraph-rsid="001f70d6"/>
    </style:style>
    <style:style style:name="P6" style:family="paragraph" style:parent-style-name="Text_20_body" style:list-style-name="L1">
      <style:paragraph-properties fo:margin-top="0cm" fo:margin-bottom="0cm" style:contextual-spacing="false"/>
      <style:text-properties officeooo:rsid="001f70d6"/>
    </style:style>
    <style:style style:name="P7" style:family="paragraph" style:parent-style-name="Text_20_body" style:list-style-name="L1">
      <style:text-properties officeooo:rsid="001f70d6"/>
    </style:style>
    <style:style style:name="P8" style:family="paragraph" style:parent-style-name="Text_20_body" style:list-style-name="L2">
      <style:paragraph-properties fo:margin-top="0cm" fo:margin-bottom="0cm" style:contextual-spacing="false"/>
      <style:text-properties officeooo:rsid="001f70d6"/>
    </style:style>
    <style:style style:name="P9" style:family="paragraph" style:parent-style-name="Text_20_body" style:list-style-name="L2">
      <style:text-properties officeooo:rsid="001f70d6"/>
    </style:style>
    <style:style style:name="P10" style:family="paragraph" style:parent-style-name="Text_20_body" style:list-style-name="L3">
      <style:paragraph-properties fo:margin-top="0cm" fo:margin-bottom="0cm" style:contextual-spacing="false"/>
      <style:text-properties officeooo:rsid="001f70d6"/>
    </style:style>
    <style:style style:name="P11" style:family="paragraph" style:parent-style-name="Text_20_body" style:list-style-name="L3">
      <style:text-properties officeooo:rsid="001f70d6"/>
    </style:style>
    <style:style style:name="P12" style:family="paragraph" style:parent-style-name="Text_20_body" style:list-style-name="L4">
      <style:paragraph-properties fo:margin-top="0cm" fo:margin-bottom="0cm" style:contextual-spacing="false"/>
      <style:text-properties officeooo:rsid="001f70d6"/>
    </style:style>
    <style:style style:name="P13" style:family="paragraph" style:parent-style-name="Text_20_body" style:list-style-name="L4">
      <style:text-properties officeooo:rsid="001f70d6"/>
    </style:style>
    <style:style style:name="P14" style:family="paragraph" style:parent-style-name="Text_20_body" style:list-style-name="L5">
      <style:paragraph-properties fo:margin-top="0cm" fo:margin-bottom="0cm" style:contextual-spacing="false"/>
      <style:text-properties officeooo:rsid="001f70d6"/>
    </style:style>
    <style:style style:name="P15" style:family="paragraph" style:parent-style-name="Text_20_body" style:list-style-name="L5">
      <style:text-properties officeooo:rsid="001f70d6"/>
    </style:style>
    <style:style style:name="P16" style:family="paragraph" style:parent-style-name="Text_20_body" style:list-style-name="L6">
      <style:paragraph-properties fo:margin-top="0cm" fo:margin-bottom="0cm" style:contextual-spacing="false"/>
      <style:text-properties officeooo:rsid="001f70d6"/>
    </style:style>
    <style:style style:name="P17" style:family="paragraph" style:parent-style-name="Text_20_body" style:list-style-name="L6">
      <style:text-properties officeooo:rsid="001f70d6"/>
    </style:style>
    <style:style style:name="P18" style:family="paragraph" style:parent-style-name="Text_20_body" style:list-style-name="L7">
      <style:paragraph-properties fo:margin-top="0cm" fo:margin-bottom="0cm" style:contextual-spacing="false"/>
      <style:text-properties officeooo:rsid="001f70d6"/>
    </style:style>
    <style:style style:name="P19" style:family="paragraph" style:parent-style-name="Text_20_body" style:list-style-name="L7">
      <style:text-properties officeooo:rsid="001f70d6"/>
    </style:style>
    <style:style style:name="P20" style:family="paragraph" style:parent-style-name="Text_20_body" style:list-style-name="L8">
      <style:paragraph-properties fo:margin-top="0cm" fo:margin-bottom="0cm" style:contextual-spacing="false"/>
      <style:text-properties officeooo:rsid="001f70d6"/>
    </style:style>
    <style:style style:name="P21" style:family="paragraph" style:parent-style-name="Text_20_body" style:list-style-name="L8">
      <style:text-properties officeooo:rsid="001f70d6"/>
    </style:style>
    <style:style style:name="T1" style:family="text">
      <style:text-properties officeooo:rsid="00232c1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log</text:h>
      <text:p text:style-name="P1"/>
      <text:p text:style-name="P1">Der Nebel liegt wie ein schwerer, feuchter Schleier über dem Meer, so dicht, dass selbst das Knarren der Planken gedämpft klingt. Während ihr langsam durch diese unnatürliche, graue Wand gleitet, schweifen eure Gedanken unweigerlich zurück zu dem Weg, der euch hierher geführt hat.</text:p>
      <text:p text:style-name="P2">Vor vielen Monden habt ihr auf der <text:span text:style-name="Strong_20_Emphasis">Gezeitenklinge</text:span> angeheuert – jenem legendären Schiff, dessen Name in den Tavernen der Küstenstädte im Flüsterton ausgesprochen wird. Unter dem Kommando des berüchtigten <text:span text:style-name="Strong_20_Emphasis">Kapitäns Rauthorn</text:span>, eines Mannes, der für seine erbarmungslose Härte gegenüber Verrätern ebenso bekannt ist wie für seine verschwenderische Großzügigkeit gegenüber jenen, die ihm treu ergeben sind.</text:p>
      <text:p text:style-name="P2">Er versprach euch <text:span text:style-name="Strong_20_Emphasis">Ruhm und Reichtum</text:span>, und er hielt Wort. Gold, Beute, Anerkennung – all das habt ihr in den vergangenen Monaten im Überfluss erlangt. Durch Mut, Geschick und Loyalität habt ihr euch in der Mannschaft einen Platz von Bedeutung erkämpft und das Vertrauen des Kapitäns gewonnen.</text:p>
      <text:p text:style-name="P2">Doch dann kam jener Tag.<text:line-break/>Der Tag <text:span text:style-name="Strong_20_Emphasis">nach dem Massaker</text:span>.<text:line-break/>Und seitdem ist nichts mehr, wie es war.</text:p>
      <text:p text:style-name="P3">Ihr erinnert euch noch an jedes Detail: das splitternde Holz des feindlichen Kriegsschiffs, das Geschrei der Verwundeten, das Dröhnen der Kanonen. </text:p>
      <text:p text:style-name="P3"/>
      <text:p text:style-name="P4">Kampf mit dem Militärschiff – siehe Statblöcke</text:p>
      <text:p text:style-name="P3"/>
      <text:p text:style-name="P3"><text:span text:style-name="T1">Z</text:span>wischen Blut und Rauch – fand Kapitän Rauthorn jenes <text:span text:style-name="Strong_20_Emphasis">alte, mystische Buch</text:span>. Ein Fund, der sein Wesen veränderte.</text:p>
      <text:p text:style-name="P2">Von diesem Moment an begann er, sich zurückzuziehen. Seine Augen wirkten fiebrig, seine Worte rätselhaft. Er sprach von einem uralten Artefakt, einem <text:span text:style-name="Strong_20_Emphasis">Splitter</text:span>, der irgendwo jenseits der bekannten See auf ihn wartete. Und so führte er die Gezeitenklinge immer weiter hinaus, fort von Handelsrouten, fort von jeder Karte, tief hinein in Gewässer, die selbst erfahrene Seeleute meiden.</text:p>
      <text:p text:style-name="P2">Die Mannschaft wurde unruhig. Misstrauen wuchs. Der Kapitän aber schien nur noch dem Flüstern des Buches zu folgen.</text:p>
      <text:p text:style-name="P2">Jetzt, Wochen später, sind die Vorräte erschöpft. Der Magen knurrt, die Kehlen brennen, und seit Stunden segelt ihr durch diesen <text:span text:style-name="Strong_20_Emphasis">verfluchten Nebel</text:span>, der jede Orientierung verschluckt. Kein Vogel, kein Windstoß, kein Laut außer dem gedämpften Schlagen der Wellen gegen den Rumpf.</text:p>
      <text:p text:style-name="P2">Und während ihr in die graue Leere starrt, drängt sich eine Frage immer stärker in eure Gedanken:</text:p>
      <text:p text:style-name="P2"><text:span text:style-name="Strong_20_Emphasis">Werdet ihr jemals wieder festen Boden unter den Füßen spüren – oder hat die Gezeitenklinge längst Kurs auf ihr eigenes Grab gesetzt?</text:span></text:p>
      <text:p text:style-name="P5"/>
      <text:p text:style-name="P5"/>
      <text:p text:style-name="P1"><text:soft-page-break/>⚓ Statblöcke für Matrosen &amp; Marinesoldaten</text:p>
      <text:p text:style-name="P2"><text:span text:style-name="Emphasis">(Shadowdark‑kompatibel, OSR‑Feeling, sofort einsetzbar)</text:span></text:p>
      <text:p text:style-name="P2">🪢 <text:span text:style-name="Strong_20_Emphasis">Matrose der Königlichen Marine</text:span></text:p>
      <text:p text:style-name="P2"><text:span text:style-name="Emphasis">Schwach bewaffnete, aber disziplinierte Seeleute. Gefährlich in Gruppen.</text:span></text:p>
      <text:p text:style-name="P2"><text:span text:style-name="Strong_20_Emphasis">Matrose (Stufe 1 Humanoid)</text:span></text:p>
      <text:list text:style-name="L1">
        <text:list-item>
          <text:p text:style-name="P6"><text:span text:style-name="Strong_20_Emphasis">HP:</text:span> 4 </text:p>
        </text:list-item>
        <text:list-item>
          <text:p text:style-name="P6"><text:span text:style-name="Strong_20_Emphasis">Rüstung:</text:span> 12 (Lederweste) </text:p>
        </text:list-item>
        <text:list-item>
          <text:p text:style-name="P6"><text:span text:style-name="Strong_20_Emphasis">Bewegung:</text:span> 30 Fuß </text:p>
        </text:list-item>
        <text:list-item>
          <text:p text:style-name="P6"><text:span text:style-name="Strong_20_Emphasis">Angriffe:</text:span> </text:p>
          <text:list>
            <text:list-item>
              <text:p text:style-name="P6"><text:span text:style-name="Emphasis">Entermesser</text:span> +2, 1d6 Schaden </text:p>
            </text:list-item>
            <text:list-item>
              <text:p text:style-name="P6"><text:span text:style-name="Emphasis">Wurfmesser</text:span> +2, 1d4 Schaden, 20 Fuß </text:p>
            </text:list-item>
          </text:list>
        </text:list-item>
        <text:list-item>
          <text:p text:style-name="P6"><text:span text:style-name="Strong_20_Emphasis">Attribute:</text:span> STR +1, DEX +1, CON +0 </text:p>
        </text:list-item>
        <text:list-item>
          <text:p text:style-name="P6"><text:span text:style-name="Strong_20_Emphasis">Moral:</text:span> 7 </text:p>
        </text:list-item>
        <text:list-item>
          <text:p text:style-name="P6"><text:span text:style-name="Strong_20_Emphasis">Ausrüstung:</text:span> Messer, Tauwerk, einfache Uniform </text:p>
        </text:list-item>
        <text:list-item>
          <text:p text:style-name="P6"><text:span text:style-name="Strong_20_Emphasis">Fertigkeiten:</text:span> </text:p>
          <text:list>
            <text:list-item>
              <text:p text:style-name="P6">Vorteil auf Proben zum Klettern an Masten, Seilen oder nassen Oberflächen </text:p>
            </text:list-item>
          </text:list>
        </text:list-item>
        <text:list-item>
          <text:p text:style-name="P7"><text:span text:style-name="Strong_20_Emphasis">Taktik:</text:span> </text:p>
        </text:list-item>
      </text:list>
      <text:list text:style-name="L2">
        <text:list-item>
          <text:p text:style-name="P8">Kämpfen selten allein </text:p>
        </text:list-item>
        <text:list-item>
          <text:p text:style-name="P8">Versuchen Gegner zu umzingeln </text:p>
        </text:list-item>
        <text:list-item>
          <text:p text:style-name="P9">Ziehen sich zurück, wenn Offiziere fallen </text:p>
        </text:list-item>
      </text:list>
      <text:p text:style-name="P2">⚔️ <text:span text:style-name="Strong_20_Emphasis">Marinesoldat</text:span></text:p>
      <text:p text:style-name="P2"><text:span text:style-name="Emphasis">Ausgebildete Nahkämpfer, die für Entergefechte trainiert sind.</text:span></text:p>
      <text:p text:style-name="P2"><text:span text:style-name="Strong_20_Emphasis">Marinesoldat (Stufe 2 Humanoid)</text:span></text:p>
      <text:list text:style-name="L3">
        <text:list-item>
          <text:p text:style-name="P10"><text:span text:style-name="Strong_20_Emphasis">HP:</text:span> 10 </text:p>
        </text:list-item>
        <text:list-item>
          <text:p text:style-name="P10"><text:span text:style-name="Strong_20_Emphasis">Rüstung:</text:span> 14 (verstärkte Lederjacke) </text:p>
        </text:list-item>
        <text:list-item>
          <text:p text:style-name="P10"><text:span text:style-name="Strong_20_Emphasis">Bewegung:</text:span> 30 Fuß </text:p>
        </text:list-item>
        <text:list-item>
          <text:p text:style-name="P10"><text:span text:style-name="Strong_20_Emphasis">Angriffe:</text:span> </text:p>
          <text:list>
            <text:list-item>
              <text:p text:style-name="P10"><text:span text:style-name="Emphasis">Säbel</text:span> +3, 1d8 Schaden </text:p>
            </text:list-item>
            <text:list-item>
              <text:p text:style-name="P10"><text:span text:style-name="Emphasis">Pistole</text:span> +2, 1d8 Schaden, Nachladen 1 Runde </text:p>
            </text:list-item>
          </text:list>
        </text:list-item>
        <text:list-item>
          <text:p text:style-name="P10"><text:span text:style-name="Strong_20_Emphasis">Attribute:</text:span> STR +2, DEX +1, CON +1 </text:p>
        </text:list-item>
        <text:list-item>
          <text:p text:style-name="P10"><text:span text:style-name="Strong_20_Emphasis">Moral:</text:span> 9 </text:p>
        </text:list-item>
        <text:list-item>
          <text:p text:style-name="P10"><text:span text:style-name="Strong_20_Emphasis">Fertigkeiten:</text:span> </text:p>
          <text:list>
            <text:list-item>
              <text:p text:style-name="P10">Vorteil auf Einschüchtern </text:p>
            </text:list-item>
            <text:list-item>
              <text:p text:style-name="P10">Vorteil auf Balance‑Proben bei schwerem Seegang </text:p>
            </text:list-item>
          </text:list>
        </text:list-item>
        <text:list-item>
          <text:p text:style-name="P11"><text:span text:style-name="Strong_20_Emphasis">Taktik:</text:span> </text:p>
        </text:list-item>
      </text:list>
      <text:list text:style-name="L4">
        <text:list-item>
          <text:p text:style-name="P12">Bilden Zweiertrupps </text:p>
        </text:list-item>
        <text:list-item>
          <text:p text:style-name="P12">Nutzen Pistolen zum Kampfbeginn </text:p>
        </text:list-item>
        <text:list-item>
          <text:p text:style-name="P13">Kämpfen bis zum Befehl zum Rückzug </text:p>
        </text:list-item>
      </text:list>
      <text:p text:style-name="P2">🛡️ <text:span text:style-name="Strong_20_Emphasis">Marineoffizier</text:span></text:p>
      <text:p text:style-name="P2"><text:span text:style-name="Emphasis">Disziplinierter Anführer, der seine Männer im Kampf zusammenhält.</text:span></text:p>
      <text:p text:style-name="P2"><text:soft-page-break/><text:span text:style-name="Strong_20_Emphasis">Marineoffizier (Stufe 3 Humanoid, Anführer)</text:span></text:p>
      <text:list text:style-name="L5">
        <text:list-item>
          <text:p text:style-name="P14"><text:span text:style-name="Strong_20_Emphasis">HP:</text:span> 16 </text:p>
        </text:list-item>
        <text:list-item>
          <text:p text:style-name="P14"><text:span text:style-name="Strong_20_Emphasis">Rüstung:</text:span> 15 (Brustplatte) </text:p>
        </text:list-item>
        <text:list-item>
          <text:p text:style-name="P14"><text:span text:style-name="Strong_20_Emphasis">Bewegung:</text:span> 30 Fuß </text:p>
        </text:list-item>
        <text:list-item>
          <text:p text:style-name="P14"><text:span text:style-name="Strong_20_Emphasis">Angriffe:</text:span> </text:p>
          <text:list>
            <text:list-item>
              <text:p text:style-name="P14"><text:span text:style-name="Emphasis">Offiziersrapier</text:span> +4, 1d8+1 Schaden </text:p>
            </text:list-item>
            <text:list-item>
              <text:p text:style-name="P14"><text:span text:style-name="Emphasis">Pistole</text:span> +3, 1d8 Schaden, Nachladen 1 Runde </text:p>
            </text:list-item>
          </text:list>
        </text:list-item>
        <text:list-item>
          <text:p text:style-name="P14"><text:span text:style-name="Strong_20_Emphasis">Attribute:</text:span> STR +2, DEX +2, CON +1, CHA +2 </text:p>
        </text:list-item>
        <text:list-item>
          <text:p text:style-name="P14"><text:span text:style-name="Strong_20_Emphasis">Moral:</text:span> 11 </text:p>
        </text:list-item>
        <text:list-item>
          <text:p text:style-name="P14"><text:span text:style-name="Strong_20_Emphasis">Fertigkeiten:</text:span> </text:p>
          <text:list>
            <text:list-item>
              <text:p text:style-name="P14">Vorteil auf Befehlsrufe &amp; Moralwürfe der eigenen Truppe </text:p>
            </text:list-item>
            <text:list-item>
              <text:p text:style-name="P14">Vorteil auf Wahrnehmung </text:p>
            </text:list-item>
          </text:list>
        </text:list-item>
        <text:list-item>
          <text:p text:style-name="P14"><text:span text:style-name="Strong_20_Emphasis">Sonderfähigkeit – Kommandoruf:</text:span> </text:p>
          <text:list>
            <text:list-item>
              <text:p text:style-name="P14">1× pro Kampf: Alle Verbündeten im Umkreis von 30 Fuß erhalten +1 auf Angriffswürfe für 1 Runde </text:p>
            </text:list-item>
          </text:list>
        </text:list-item>
        <text:list-item>
          <text:p text:style-name="P15"><text:span text:style-name="Strong_20_Emphasis">Taktik:</text:span> </text:p>
        </text:list-item>
      </text:list>
      <text:list text:style-name="L6">
        <text:list-item>
          <text:p text:style-name="P16">Bleibt hinter der Front </text:p>
        </text:list-item>
        <text:list-item>
          <text:p text:style-name="P16">Koordiniert Angriffe </text:p>
        </text:list-item>
        <text:list-item>
          <text:p text:style-name="P17">Greift persönlich ein, wenn der Kampf kippt </text:p>
        </text:list-item>
      </text:list>
      <text:p text:style-name="P2">🔥 <text:span text:style-name="Strong_20_Emphasis">Veteranen‑Kanoniere</text:span></text:p>
      <text:p text:style-name="P2"><text:span text:style-name="Emphasis">Die gefährlichsten Männer an Bord – und sie wissen es.</text:span></text:p>
      <text:p text:style-name="P2"><text:span text:style-name="Strong_20_Emphasis">Kanonier (Stufe 2 Humanoid)</text:span></text:p>
      <text:list text:style-name="L7">
        <text:list-item>
          <text:p text:style-name="P18"><text:span text:style-name="Strong_20_Emphasis">HP:</text:span> 8 </text:p>
        </text:list-item>
        <text:list-item>
          <text:p text:style-name="P18"><text:span text:style-name="Strong_20_Emphasis">Rüstung:</text:span> 13 </text:p>
        </text:list-item>
        <text:list-item>
          <text:p text:style-name="P18"><text:span text:style-name="Strong_20_Emphasis">Bewegung:</text:span> 25 Fuß </text:p>
        </text:list-item>
        <text:list-item>
          <text:p text:style-name="P18"><text:span text:style-name="Strong_20_Emphasis">Angriffe:</text:span> </text:p>
          <text:list>
            <text:list-item>
              <text:p text:style-name="P18"><text:span text:style-name="Emphasis">Kurzschwert</text:span> +2, 1d6 Schaden </text:p>
            </text:list-item>
            <text:list-item>
              <text:p text:style-name="P18"><text:span text:style-name="Emphasis">Handkanone</text:span> +2, 1d10 Schaden, Nachladen 2 Runden </text:p>
            </text:list-item>
          </text:list>
        </text:list-item>
        <text:list-item>
          <text:p text:style-name="P18"><text:span text:style-name="Strong_20_Emphasis">Attribute:</text:span> STR +1, DEX +1, CON +1 </text:p>
        </text:list-item>
        <text:list-item>
          <text:p text:style-name="P18"><text:span text:style-name="Strong_20_Emphasis">Moral:</text:span> 8 </text:p>
        </text:list-item>
        <text:list-item>
          <text:p text:style-name="P18"><text:span text:style-name="Strong_20_Emphasis">Sonderfähigkeit – Pulverexperte:</text:span> </text:p>
          <text:list>
            <text:list-item>
              <text:p text:style-name="P18">Vorteil auf Proben zum Bedienen von Kanonen </text:p>
            </text:list-item>
            <text:list-item>
              <text:p text:style-name="P18">Bei einem Treffer mit der Handkanone: +1 Schaden </text:p>
            </text:list-item>
          </text:list>
        </text:list-item>
        <text:list-item>
          <text:p text:style-name="P19"><text:span text:style-name="Strong_20_Emphasis">Taktik:</text:span> </text:p>
        </text:list-item>
      </text:list>
      <text:list text:style-name="L8">
        <text:list-item>
          <text:p text:style-name="P20">Halten Distanz </text:p>
        </text:list-item>
        <text:list-item>
          <text:p text:style-name="P20">Nutzen Deckung </text:p>
        </text:list-item>
        <text:list-item>
          <text:p text:style-name="P21">Ziehen sich zurück, wenn sie im Nahkampf bedrängt werden </text:p>
        </text:list-item>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31T12:39:58.636495200</meta:creation-date>
    <dc:date>2026-01-31T13:03:09.076360600</dc:date>
    <meta:editing-duration>PT11M37S</meta:editing-duration>
    <meta:editing-cycles>2</meta:editing-cycles>
    <meta:generator>LibreOffice/25.2.7.2$Windows_X86_64 LibreOffice_project/5cbfd1ab6520636bb5f7b99185aa69bd7456825d</meta:generator>
    <meta:document-statistic meta:table-count="0" meta:image-count="0" meta:object-count="0" meta:page-count="3" meta:paragraph-count="89" meta:word-count="739" meta:character-count="4650" meta:non-whitespace-character-count="3991"/>
  </office:meta>
</office:document-meta>
</file>