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a3cdb" officeooo:paragraph-rsid="0012d1d2" style:font-weight-asian="bold" style:font-weight-complex="bold"/>
    </style:style>
    <style:style style:name="P2" style:family="paragraph" style:parent-style-name="Text_20_body">
      <style:text-properties officeooo:rsid="002a3cdb" officeooo:paragraph-rsid="0012d1d2"/>
    </style:style>
    <style:style style:name="P3" style:family="paragraph" style:parent-style-name="Text_20_body">
      <style:text-properties officeooo:paragraph-rsid="0012d1d2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12d1d2"/>
    </style:style>
    <style:style style:name="P5" style:family="paragraph" style:parent-style-name="Text_20_body" style:list-style-name="L1">
      <style:text-properties officeooo:paragraph-rsid="0012d1d2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12d1d2"/>
    </style:style>
    <style:style style:name="P7" style:family="paragraph" style:parent-style-name="Text_20_body" style:list-style-name="L2">
      <style:text-properties officeooo:paragraph-rsid="0012d1d2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paragraph-rsid="0012d1d2"/>
    </style:style>
    <style:style style:name="P9" style:family="paragraph" style:parent-style-name="Text_20_body" style:list-style-name="L3">
      <style:text-properties officeooo:paragraph-rsid="0012d1d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c8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🔹 <text:span text:style-name="Strong_20_Emphasis">Platte 1 – „Geboren in den tiefen des Meeres“</text:span></text:p>
      <text:p text:style-name="P1">Symbol über der Platte:</text:p>
      <text:p text:style-name="P2">Ein dunkler Schatten eines Ungeheuers</text:p>
      <text:p text:style-name="P3"><text:span text:style-name="Strong_20_Emphasis">Symbole auf der Platte:</text:span></text:p>
      <text:list text:style-name="L1">
        <text:list-item>
          <text:p text:style-name="P4">🌊 <text:span text:style-name="Strong_20_Emphasis"><text:span text:style-name="T1">Welle</text:span></text:span> </text:p>
        </text:list-item>
        <text:list-item>
          <text:p text:style-name="P4">🪨 Fels </text:p>
        </text:list-item>
        <text:list-item>
          <text:p text:style-name="P4">🐚 Muschel </text:p>
        </text:list-item>
        <text:list-item>
          <text:p text:style-name="P4">🌀 Strudel </text:p>
        </text:list-item>
        <text:list-item>
          <text:p text:style-name="P5">🌑 <text:span text:style-name="T1">Dunkelheit</text:span><text:span text:style-name="T2"> </text:span></text:p>
        </text:list-item>
      </text:list>
      <text:p text:style-name="P3">🔹 <text:span text:style-name="Strong_20_Emphasis">Platte 2 – „Gebunden von Menschen Hand“</text:span></text:p>
      <text:p text:style-name="P3"><text:span text:style-name="Strong_20_Emphasis">Thema:</text:span> Fessel, Bann, Kontrolle</text:p>
      <text:p text:style-name="P1">Symbol über der Platte:</text:p>
      <text:p text:style-name="P2">Ein Ungeheuer</text:p>
      <text:p text:style-name="P3"><text:span text:style-name="Strong_20_Emphasis">Symbole auf der Platte:</text:span></text:p>
      <text:list text:style-name="L2">
        <text:list-item>
          <text:p text:style-name="P6">🔗 <text:span text:style-name="Strong_20_Emphasis"><text:span text:style-name="T1">Kette</text:span></text:span> </text:p>
        </text:list-item>
        <text:list-item>
          <text:p text:style-name="P6">⚓ Anker </text:p>
        </text:list-item>
        <text:list-item>
          <text:p text:style-name="P6">🪬 Schutzsymbol </text:p>
        </text:list-item>
        <text:list-item>
          <text:p text:style-name="P6">🗝 Schlüssel </text:p>
        </text:list-item>
        <text:list-item>
          <text:p text:style-name="P7">🧱 Mauer </text:p>
        </text:list-item>
      </text:list>
      <text:p text:style-name="P3">🔹 <text:span text:style-name="Strong_20_Emphasis">Platte 3 – „Niemals darf er </text:span><text:span text:style-name="Strong_20_Emphasis"><text:span text:style-name="T3">Wiederkehren</text:span></text:span><text:span text:style-name="Strong_20_Emphasis">“</text:span></text:p>
      <text:p text:style-name="P3"><text:span text:style-name="Strong_20_Emphasis">Thema:</text:span> Tod, Rückkehr, Verbotene Erneuerung</text:p>
      <text:p text:style-name="P1">Symbol über der Platte:</text:p>
      <text:p text:style-name="P2">Eine Hand die etwas nach unten drückt</text:p>
      <text:p text:style-name="P3"><text:span text:style-name="Strong_20_Emphasis">Symbole auf der Platte:</text:span></text:p>
      <text:list text:style-name="L3">
        <text:list-item>
          <text:p text:style-name="P8">☀️ Sonne </text:p>
        </text:list-item>
        <text:list-item>
          <text:p text:style-name="P8">🌱 Spross </text:p>
        </text:list-item>
        <text:list-item>
          <text:p text:style-name="P8">🔥 Flamme </text:p>
        </text:list-item>
        <text:list-item>
          <text:p text:style-name="P8">💀 Schädel mit aufsteigendem Licht</text:p>
        </text:list-item>
        <text:list-item>
          <text:p text:style-name="P9">🕳 Abgrun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09:07:04.245133700</meta:creation-date>
    <dc:date>2026-01-31T09:11:01.889296900</dc:date>
    <meta:editing-duration>PT3M57S</meta:editing-duration>
    <meta:editing-cycles>2</meta:editing-cycles>
    <meta:generator>LibreOffice/25.2.7.2$Windows_X86_64 LibreOffice_project/5cbfd1ab6520636bb5f7b99185aa69bd7456825d</meta:generator>
    <meta:print-date>2026-01-31T09:10:19.994061800</meta:print-date>
    <meta:document-statistic meta:table-count="0" meta:image-count="0" meta:object-count="0" meta:page-count="1" meta:paragraph-count="29" meta:word-count="118" meta:character-count="626" meta:non-whitespace-character-count="535"/>
  </office:meta>
</office:document-meta>
</file>