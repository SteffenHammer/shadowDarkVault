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d040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20">
      <style:paragraph-properties fo:margin-top="0cm" fo:margin-bottom="0cm" style:contextual-spacing="false"/>
      <style:text-properties officeooo:paragraph-rsid="000ed040"/>
    </style:style>
    <style:style style:name="P38" style:family="paragraph" style:parent-style-name="Text_20_body" style:list-style-name="L20">
      <style:text-properties officeooo:paragraph-rsid="000ed040"/>
    </style:style>
    <style:style style:name="P39" style:family="paragraph" style:parent-style-name="Text_20_body" style:list-style-name="L21">
      <style:paragraph-properties fo:margin-top="0cm" fo:margin-bottom="0cm" style:contextual-spacing="false"/>
      <style:text-properties officeooo:paragraph-rsid="000ed040"/>
    </style:style>
    <style:style style:name="P40" style:family="paragraph" style:parent-style-name="Text_20_body" style:list-style-name="L21">
      <style:text-properties officeooo:paragraph-rsid="000ed040"/>
    </style:style>
    <style:style style:name="P41" style:family="paragraph" style:parent-style-name="Text_20_body" style:list-style-name="L22">
      <style:paragraph-properties fo:margin-top="0cm" fo:margin-bottom="0cm" style:contextual-spacing="false"/>
      <style:text-properties officeooo:paragraph-rsid="000ed040"/>
    </style:style>
    <style:style style:name="P42" style:family="paragraph" style:parent-style-name="Text_20_body" style:list-style-name="L22">
      <style:text-properties officeooo:paragraph-rsid="000ed040"/>
    </style:style>
    <style:style style:name="P43" style:family="paragraph" style:parent-style-name="Text_20_body" style:list-style-name="L23">
      <style:paragraph-properties fo:margin-top="0cm" fo:margin-bottom="0cm" style:contextual-spacing="false"/>
      <style:text-properties officeooo:paragraph-rsid="000ed040"/>
    </style:style>
    <style:style style:name="P44" style:family="paragraph" style:parent-style-name="Text_20_body" style:list-style-name="L23">
      <style:text-properties officeooo:paragraph-rsid="000ed040"/>
    </style:style>
    <style:style style:name="P45" style:family="paragraph" style:parent-style-name="Text_20_body" style:list-style-name="L24">
      <style:paragraph-properties fo:margin-top="0cm" fo:margin-bottom="0cm" style:contextual-spacing="false"/>
      <style:text-properties officeooo:paragraph-rsid="000ed040"/>
    </style:style>
    <style:style style:name="P46" style:family="paragraph" style:parent-style-name="Text_20_body" style:list-style-name="L24">
      <style:text-properties officeooo:paragraph-rsid="000ed040"/>
    </style:style>
    <style:style style:name="P47" style:family="paragraph" style:parent-style-name="Text_20_body" style:list-style-name="L25">
      <style:paragraph-properties fo:margin-top="0cm" fo:margin-bottom="0cm" style:contextual-spacing="false"/>
      <style:text-properties officeooo:paragraph-rsid="000ed040"/>
    </style:style>
    <style:style style:name="P48" style:family="paragraph" style:parent-style-name="Text_20_body" style:list-style-name="L25">
      <style:text-properties officeooo:paragraph-rsid="000ed040"/>
    </style:style>
    <style:style style:name="P49" style:family="paragraph" style:parent-style-name="Text_20_body" style:list-style-name="L26">
      <style:paragraph-properties fo:margin-top="0cm" fo:margin-bottom="0cm" style:contextual-spacing="false"/>
      <style:text-properties officeooo:paragraph-rsid="000ed040"/>
    </style:style>
    <style:style style:name="P50" style:family="paragraph" style:parent-style-name="Text_20_body" style:list-style-name="L26">
      <style:text-properties officeooo:paragraph-rsid="000ed040"/>
    </style:style>
    <style:style style:name="P51" style:family="paragraph" style:parent-style-name="Text_20_body" style:list-style-name="L27">
      <style:paragraph-properties fo:margin-top="0cm" fo:margin-bottom="0cm" style:contextual-spacing="false"/>
      <style:text-properties officeooo:paragraph-rsid="000ed040"/>
    </style:style>
    <style:style style:name="P52" style:family="paragraph" style:parent-style-name="Text_20_body" style:list-style-name="L27">
      <style:text-properties officeooo:paragraph-rsid="000ed040"/>
    </style:style>
    <style:style style:name="P53" style:family="paragraph" style:parent-style-name="Text_20_body" style:list-style-name="L28">
      <style:paragraph-properties fo:margin-top="0cm" fo:margin-bottom="0cm" style:contextual-spacing="false"/>
      <style:text-properties officeooo:paragraph-rsid="000ed040"/>
    </style:style>
    <style:style style:name="P54" style:family="paragraph" style:parent-style-name="Text_20_body" style:list-style-name="L28">
      <style:text-properties officeooo:paragraph-rsid="000ed040"/>
    </style:style>
    <style:style style:name="P55" style:family="paragraph" style:parent-style-name="Text_20_body" style:list-style-name="L29">
      <style:paragraph-properties fo:margin-top="0cm" fo:margin-bottom="0cm" style:contextual-spacing="false"/>
      <style:text-properties officeooo:paragraph-rsid="000ed040"/>
    </style:style>
    <style:style style:name="P56" style:family="paragraph" style:parent-style-name="Text_20_body" style:list-style-name="L29">
      <style:text-properties officeooo:paragraph-rsid="000ed040"/>
    </style:style>
    <style:style style:name="P57" style:family="paragraph" style:parent-style-name="Text_20_body" style:list-style-name="L30">
      <style:paragraph-properties fo:margin-top="0cm" fo:margin-bottom="0cm" style:contextual-spacing="false"/>
      <style:text-properties officeooo:paragraph-rsid="000ed040"/>
    </style:style>
    <style:style style:name="P58" style:family="paragraph" style:parent-style-name="Text_20_body" style:list-style-name="L30">
      <style:text-properties officeooo:paragraph-rsid="000ed040"/>
    </style:style>
    <style:style style:name="P59" style:family="paragraph" style:parent-style-name="Text_20_body" style:list-style-name="L31">
      <style:paragraph-properties fo:margin-top="0cm" fo:margin-bottom="0cm" style:contextual-spacing="false"/>
      <style:text-properties officeooo:paragraph-rsid="000ed040"/>
    </style:style>
    <style:style style:name="P60" style:family="paragraph" style:parent-style-name="Text_20_body" style:list-style-name="L31">
      <style:text-properties officeooo:paragraph-rsid="000ed040"/>
    </style:style>
    <style:style style:name="P61" style:family="paragraph" style:parent-style-name="Text_20_body" style:list-style-name="L32">
      <style:paragraph-properties fo:margin-top="0cm" fo:margin-bottom="0cm" style:contextual-spacing="false"/>
      <style:text-properties officeooo:paragraph-rsid="000ed040"/>
    </style:style>
    <style:style style:name="P62" style:family="paragraph" style:parent-style-name="Text_20_body" style:list-style-name="L32">
      <style:text-properties officeooo:paragraph-rsid="000ed040"/>
    </style:style>
    <style:style style:name="P63" style:family="paragraph" style:parent-style-name="Text_20_body" style:list-style-name="L33">
      <style:paragraph-properties fo:margin-top="0cm" fo:margin-bottom="0cm" style:contextual-spacing="false"/>
      <style:text-properties officeooo:paragraph-rsid="000ed040"/>
    </style:style>
    <style:style style:name="P64" style:family="paragraph" style:parent-style-name="Text_20_body" style:list-style-name="L33">
      <style:text-properties officeooo:paragraph-rsid="000ed040"/>
    </style:style>
    <style:style style:name="P65" style:family="paragraph" style:parent-style-name="Text_20_body" style:list-style-name="L34">
      <style:paragraph-properties fo:margin-top="0cm" fo:margin-bottom="0cm" style:contextual-spacing="false"/>
      <style:text-properties officeooo:paragraph-rsid="000ed040"/>
    </style:style>
    <style:style style:name="P66" style:family="paragraph" style:parent-style-name="Text_20_body" style:list-style-name="L34">
      <style:text-properties officeooo:paragraph-rsid="000ed040"/>
    </style:style>
    <style:style style:name="P67" style:family="paragraph" style:parent-style-name="Text_20_body" style:list-style-name="L35">
      <style:paragraph-properties fo:margin-top="0cm" fo:margin-bottom="0cm" style:contextual-spacing="false"/>
      <style:text-properties officeooo:paragraph-rsid="000ed040"/>
    </style:style>
    <style:style style:name="P68" style:family="paragraph" style:parent-style-name="Text_20_body" style:list-style-name="L35">
      <style:text-properties officeooo:paragraph-rsid="000ed040"/>
    </style:style>
    <style:style style:name="P69" style:family="paragraph" style:parent-style-name="Text_20_body" style:list-style-name="L36">
      <style:paragraph-properties fo:margin-top="0cm" fo:margin-bottom="0cm" style:contextual-spacing="false"/>
      <style:text-properties officeooo:paragraph-rsid="000ed040"/>
    </style:style>
    <style:style style:name="P70" style:family="paragraph" style:parent-style-name="Text_20_body" style:list-style-name="L36">
      <style:text-properties officeooo:paragraph-rsid="000ed040"/>
    </style:style>
    <style:style style:name="P71" style:family="paragraph" style:parent-style-name="Text_20_body" style:list-style-name="L37">
      <style:paragraph-properties fo:margin-top="0cm" fo:margin-bottom="0cm" style:contextual-spacing="false"/>
      <style:text-properties officeooo:paragraph-rsid="000ed040"/>
    </style:style>
    <style:style style:name="P72" style:family="paragraph" style:parent-style-name="Text_20_body" style:list-style-name="L37">
      <style:text-properties officeooo:paragraph-rsid="000ed040"/>
    </style:style>
    <style:style style:name="P73" style:family="paragraph" style:parent-style-name="Text_20_body" style:list-style-name="L38">
      <style:paragraph-properties fo:margin-top="0cm" fo:margin-bottom="0cm" style:contextual-spacing="false"/>
      <style:text-properties officeooo:paragraph-rsid="000ed040"/>
    </style:style>
    <style:style style:name="P74" style:family="paragraph" style:parent-style-name="Text_20_body" style:list-style-name="L38">
      <style:text-properties officeooo:paragraph-rsid="000ed040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⚔️ STATBLOCKS FÜR ABENTEUER I</text:span></text:p>
      <text:p text:style-name="Text_20_body"><text:span text:style-name="T1">💀 </text:span><text:span text:style-name="Strong_20_Emphasis"><text:span text:style-name="T1">1. Geisterpiraten, die keine Ruhe finden</text:span></text:span></text:p>
      <text:p text:style-name="Text_20_body"><text:span text:style-name="Emphasis">Untote Seelen, an den Splitter gebunden.</text:span></text:p>
      <text:p text:style-name="Text_20_body"><text:span text:style-name="Strong_20_Emphasis">AC</text:span> 14<text:line-break/><text:span text:style-name="Strong_20_Emphasis">HP</text:span> 10 (3d6)<text:line-break/><text:span text:style-name="Strong_20_Emphasis">Bewegung</text:span> 30 ft, Schweben 20 ft<text:line-break/><text:span text:style-name="Strong_20_Emphasis">Angriff</text:span> Geisterklinge +3 (1d6 + 1d4 Nekrotisch)<text:line-break/><text:span text:style-name="Strong_20_Emphasis">Moral</text:span> 12</text:p>
      <text:p text:style-name="Text_20_body"><text:span text:style-name="Strong_20_Emphasis">Besonderheiten</text:span></text:p>
      <text:list text:style-name="L1">
        <text:list-item>
          <text:p text:style-name="P2"><text:span text:style-name="Strong_20_Emphasis">Ätherisch:</text:span> 50% Chance, dass physische Angriffe sie verfehlen (W20 ≥ 11). </text:p>
        </text:list-item>
        <text:list-item>
          <text:p text:style-name="P2"><text:span text:style-name="Strong_20_Emphasis">Fluch der Tiefe:</text:span> Bei Treffer WIS-Save DC 12 oder 1 Runde verängstigt. </text:p>
        </text:list-item>
        <text:list-item>
          <text:p text:style-name="P2"><text:span text:style-name="Strong_20_Emphasis">Gebunden:</text:span> Kann sich nicht weiter als 100 ft vom Ort ihres Todes entfernen. </text:p>
        </text:list-item>
        <text:list-item>
          <text:p text:style-name="P3"><text:span text:style-name="Strong_20_Emphasis">Klagelaute:</text:span> 1×/Tag, alle in 20 ft WIS-Save DC 13 oder −1 auf Angriffe für 1W4 Runden. </text:p>
        </text:list-item>
      </text:list>
      <text:p text:style-name="Text_20_body"><text:span text:style-name="T1">🐍 </text:span><text:span text:style-name="Strong_20_Emphasis"><text:span text:style-name="T1">2. Riesenschlange (Baumschlange der Tiefe)</text:span></text:span></text:p>
      <text:p text:style-name="Text_20_body"><text:span text:style-name="Emphasis">Ein uraltes Raubtier, das sich lautlos durch die Baumkronen bewegt.</text:span></text:p>
      <text:p text:style-name="Text_20_body"><text:span text:style-name="Strong_20_Emphasis">AC</text:span> 13<text:line-break/><text:span text:style-name="Strong_20_Emphasis">HP</text:span> 16 (4d6+4)<text:line-break/><text:span text:style-name="Strong_20_Emphasis">Bewegung</text:span> 30 ft, Klettern 30 ft<text:line-break/><text:span text:style-name="Strong_20_Emphasis">Angriff</text:span> Biss +4 (1d8 + Gift 1d4)<text:line-break/><text:span text:style-name="Strong_20_Emphasis">Moral</text:span> 9</text:p>
      <text:p text:style-name="Text_20_body"><text:span text:style-name="Strong_20_Emphasis">Besonderheiten</text:span></text:p>
      <text:list text:style-name="L2">
        <text:list-item>
          <text:p text:style-name="P4"><text:span text:style-name="Strong_20_Emphasis">Umklammern:</text:span> Bei Treffer STR-Save DC 13 oder festgehalten (1d4 Schaden pro Runde). </text:p>
        </text:list-item>
        <text:list-item>
          <text:p text:style-name="P4"><text:span text:style-name="Strong_20_Emphasis">Baumjäger:</text:span> Vorteil auf Angriffe gegen überraschte Ziele. </text:p>
        </text:list-item>
        <text:list-item>
          <text:p text:style-name="P4"><text:span text:style-name="Strong_20_Emphasis">Tarnung:</text:span> Vorteil auf DEX-Stealth in Wald/Dschungel. </text:p>
        </text:list-item>
        <text:list-item>
          <text:p text:style-name="P5"><text:span text:style-name="Strong_20_Emphasis">Fluchtinstinkt:</text:span> Bei 5 HP oder weniger Moralwurf mit −2. </text:p>
        </text:list-item>
      </text:list>
      <text:p text:style-name="Text_20_body"><text:span text:style-name="T1">🪶 </text:span><text:span text:style-name="Strong_20_Emphasis"><text:span text:style-name="T1">3. Überlebende Eingeborene (Stammeskrieger)</text:span></text:span></text:p>
      <text:p text:style-name="Text_20_body"><text:span text:style-name="Emphasis">Verängstigt, misstrauisch, aber entschlossen zu überleben.</text:span></text:p>
      <text:p text:style-name="Text_20_body"><text:span text:style-name="Strong_20_Emphasis">AC</text:span> 12<text:line-break/><text:span text:style-name="Strong_20_Emphasis">HP</text:span> 6 (2d6)<text:line-break/><text:span text:style-name="Strong_20_Emphasis">Bewegung</text:span> 30 ft<text:line-break/><text:span text:style-name="Strong_20_Emphasis">Angriff</text:span> Speer +2 (1d6) oder Wurfspeer +2 (1d6, Reichweite 20/60)<text:line-break/><text:span text:style-name="Strong_20_Emphasis">Moral</text:span> 8</text:p>
      <text:p text:style-name="Text_20_body"><text:span text:style-name="Strong_20_Emphasis">Besonderheiten</text:span></text:p>
      <text:list text:style-name="L3">
        <text:list-item>
          <text:p text:style-name="P6"><text:span text:style-name="Strong_20_Emphasis">Stammeswissen:</text:span> Vorteil auf Würfe zum Finden von Pfaden, Spuren oder sicheren Orten. </text:p>
        </text:list-item>
        <text:list-item>
          <text:p text:style-name="P6"><text:span text:style-name="Strong_20_Emphasis">Verzweifelte Verteidiger:</text:span> Wenn sie in der Unterzahl sind, +1 auf Schaden. </text:p>
        </text:list-item>
        <text:list-item>
          <text:p text:style-name="P6"><text:span text:style-name="Strong_20_Emphasis">Misstrauisch:</text:span> Reagieren feindselig, bis sie überzeugt werden (CHA DC 12). </text:p>
        </text:list-item>
        <text:list-item>
          <text:p text:style-name="P7"><text:span text:style-name="Strong_20_Emphasis">Schamanische Warnungen:</text:span> 1×/Tag kann ein Krieger einen Verbündeten vor Gefahr warnen → Vorteil auf nächsten Save. </text:p>
        </text:list-item>
      </text:list>
      <text:p text:style-name="Text_20_body"/>
      <text:p text:style-name="Text_20_body"><text:soft-page-break/><text:span text:style-name="T1">🦀 </text:span><text:span text:style-name="Strong_20_Emphasis"><text:span text:style-name="T1">4. Riesige Steinkrabben (Felskrabben der Küste)</text:span></text:span></text:p>
      <text:p text:style-name="Text_20_body"><text:span text:style-name="Emphasis">Sie wirken wie harmlose Felsbrocken — bis sie sich bewegen.</text:span></text:p>
      <text:p text:style-name="Text_20_body"><text:span text:style-name="Strong_20_Emphasis">AC</text:span> 16 (harte Schale)<text:line-break/><text:span text:style-name="Strong_20_Emphasis">HP</text:span> 18 (4d8)<text:line-break/><text:span text:style-name="Strong_20_Emphasis">Bewegung</text:span> 20 ft<text:line-break/><text:span text:style-name="Strong_20_Emphasis">Angriff</text:span> Scherenhieb +4 (1d8)<text:line-break/><text:span text:style-name="Strong_20_Emphasis">Moral</text:span> 11</text:p>
      <text:p text:style-name="Text_20_body"><text:span text:style-name="Strong_20_Emphasis">Besonderheiten</text:span></text:p>
      <text:list text:style-name="L4">
        <text:list-item>
          <text:p text:style-name="P8"><text:span text:style-name="Strong_20_Emphasis">Steintarnung:</text:span> Perfekte Tarnung, bis sie sich bewegen (WIS-Save DC 14 zum Entdecken). </text:p>
        </text:list-item>
        <text:list-item>
          <text:p text:style-name="P8"><text:span text:style-name="Strong_20_Emphasis">Panzerhaut:</text:span> Resistenz gegen nichtmagische Waffen. </text:p>
        </text:list-item>
        <text:list-item>
          <text:p text:style-name="P8"><text:span text:style-name="Strong_20_Emphasis">Zermalmen:</text:span> Bei kritischem Treffer zusätzlich 1d6 Schaden. </text:p>
        </text:list-item>
        <text:list-item>
          <text:p text:style-name="P9"><text:span text:style-name="Strong_20_Emphasis">Seitwärtsansturm:</text:span> 1×/Tag kann die Krabbe 30 ft seitlich sprinten und einen Angriff mit Vorteil ausführen. </text:p>
        </text:list-item>
      </text:list>
      <text:p text:style-name="Text_20_body"><text:span text:style-name="T1">🐒 </text:span><text:span text:style-name="Strong_20_Emphasis"><text:span text:style-name="T1">5. Verfluchter Affenschwarm</text:span></text:span></text:p>
      <text:p text:style-name="Text_20_body"><text:span text:style-name="Emphasis">Vom Splitter verdorben, aggressiv und unberechenbar.</text:span></text:p>
      <text:p text:style-name="Text_20_body"><text:span text:style-name="Strong_20_Emphasis">AC</text:span> 13<text:line-break/><text:span text:style-name="Strong_20_Emphasis">HP</text:span> 8 (2d8)<text:line-break/><text:span text:style-name="Strong_20_Emphasis">Bewegung</text:span> 30 ft, Klettern 30 ft<text:line-break/><text:span text:style-name="Strong_20_Emphasis">Angriff</text:span> Krallen +2 (1d4)<text:line-break/><text:span text:style-name="Strong_20_Emphasis">Moral</text:span> 10</text:p>
      <text:p text:style-name="Text_20_body"><text:span text:style-name="Strong_20_Emphasis">Besonderheiten</text:span></text:p>
      <text:list text:style-name="L5">
        <text:list-item>
          <text:p text:style-name="P10"><text:span text:style-name="Strong_20_Emphasis">Schwarmverhalten:</text:span> Vorteil auf Angriffe, wenn mindestens 2 Affen angrenzen. </text:p>
        </text:list-item>
        <text:list-item>
          <text:p text:style-name="P10"><text:span text:style-name="Strong_20_Emphasis">Splitterfluch:</text:span> Beim Tod explodiert 1 Affe in nekrotischer Energie (1d4 Schaden in 5 ft Umkreis). </text:p>
        </text:list-item>
        <text:list-item>
          <text:p text:style-name="P10"><text:span text:style-name="Strong_20_Emphasis">Kletterei:</text:span> Kann sich über SC hinweg bewegen ohne Gelegenheitsangriff. </text:p>
        </text:list-item>
        <text:list-item>
          <text:p text:style-name="P11"><text:span text:style-name="Strong_20_Emphasis">Chaosgekreisch:</text:span> 1×/Tag, alle in 15 ft WIS-Save DC 12 oder 1 Runde benommen. </text:p>
        </text:list-item>
      </text:list>
      <text:p text:style-name="P1"><text:span text:style-name="Strong_20_Emphasis"><text:span text:style-name="T1">🐒🔥 Alpha des Verfluchten Affenschwarms</text:span></text:span></text:p>
      <text:p text:style-name="Text_20_body"><text:span text:style-name="Emphasis">Ein grotesk mutierter Anführer, vom Splitter der Tiefe verdorben. Seine Augen glühen bläulich, sein Fell ist struppig und nass wie von Meersalz, und seine Bewegungen sind unnatürlich ruckartig.</text:span></text:p>
      <text:p text:style-name="Text_20_body"><text:span text:style-name="Strong_20_Emphasis">AC</text:span> 14<text:line-break/><text:span text:style-name="Strong_20_Emphasis">HP</text:span> 18 (4d8)<text:line-break/><text:span text:style-name="Strong_20_Emphasis">Bewegung</text:span> 30 ft, Klettern 30 ft<text:line-break/><text:span text:style-name="Strong_20_Emphasis">Angriff</text:span> Klauen +4 (1d6+2)<text:line-break/><text:span text:style-name="Strong_20_Emphasis">Moral</text:span> 12</text:p>
      <text:p text:style-name="Text_20_body"><text:span text:style-name="Strong_20_Emphasis">Besonderheiten</text:span></text:p>
      <text:p text:style-name="Text_20_body"><text:span text:style-name="Strong_20_Emphasis">🐾 Rudelführer</text:span></text:p>
      <text:p text:style-name="Text_20_body">Alle verfluchten Affen innerhalb von 20 ft erhalten:</text:p>
      <text:list text:style-name="L6">
        <text:list-item>
          <text:p text:style-name="P12">+1 auf Angriff </text:p>
        </text:list-item>
        <text:list-item>
          <text:p text:style-name="P12">+1 auf Schaden </text:p>
        </text:list-item>
        <text:list-item>
          <text:p text:style-name="P13"><text:soft-page-break/>Vorteil auf Moralwürfe </text:p>
        </text:list-item>
      </text:list>
      <text:p text:style-name="Text_20_body">Solange der Alpha lebt, flieht der Schwarm nicht.</text:p>
      <text:p text:style-name="Text_20_body"><text:span text:style-name="Strong_20_Emphasis">💀 Splitterseuche</text:span></text:p>
      <text:p text:style-name="Text_20_body">Bei einem erfolgreichen Angriff muss das Ziel einen <text:span text:style-name="Strong_20_Emphasis">CON‑Save DC 12</text:span> bestehen oder:</text:p>
      <text:list text:style-name="L7">
        <text:list-item>
          <text:p text:style-name="P14">1d4 nekrotischen Schaden zusätzlich erleiden </text:p>
        </text:list-item>
        <text:list-item>
          <text:p text:style-name="P15">1 Runde lang Nachteil auf DEX‑Saves haben </text:p>
        </text:list-item>
      </text:list>
      <text:p text:style-name="Text_20_body">Die Wunden wirken schwarz und pulsierend.</text:p>
      <text:p text:style-name="Text_20_body"><text:span text:style-name="Strong_20_Emphasis">🦴 Knochenkreischer (1×/Tag)</text:span></text:p>
      <text:p text:style-name="Text_20_body">Der Alpha stößt einen markerschütternden Schrei aus.<text:line-break/>Alle Kreaturen in 20 ft:</text:p>
      <text:list text:style-name="L8">
        <text:list-item>
          <text:p text:style-name="P16"><text:span text:style-name="Strong_20_Emphasis">WIS‑Save DC 13</text:span> </text:p>
        </text:list-item>
        <text:list-item>
          <text:p text:style-name="P16">Bei Misserfolg: 1 Runde <text:span text:style-name="Strong_20_Emphasis">benommen</text:span> und 1d4 psychischer Schaden </text:p>
        </text:list-item>
        <text:list-item>
          <text:p text:style-name="P17">Bei Erfolg: halbierter Schaden, keine Benommenheit </text:p>
        </text:list-item>
      </text:list>
      <text:p text:style-name="Text_20_body">Der Schrei lässt die Luft kurz flimmern, als würde etwas Unsichtbares mitschreien.</text:p>
      <text:p text:style-name="Text_20_body"><text:span text:style-name="Strong_20_Emphasis">🩸 Berserkerwut</text:span></text:p>
      <text:p text:style-name="Text_20_body">Wenn der Alpha unter 6 HP fällt:</text:p>
      <text:list text:style-name="L9">
        <text:list-item>
          <text:p text:style-name="P18">Er erhält <text:span text:style-name="Strong_20_Emphasis">+2 auf Angriff</text:span> </text:p>
        </text:list-item>
        <text:list-item>
          <text:p text:style-name="P18">Er verursacht <text:span text:style-name="Strong_20_Emphasis">+2 Schaden</text:span> </text:p>
        </text:list-item>
        <text:list-item>
          <text:p text:style-name="P19">Er kann <text:span text:style-name="Strong_20_Emphasis">zwei Klauenangriffe pro Runde</text:span> ausführen </text:p>
        </text:list-item>
      </text:list>
      <text:p text:style-name="Text_20_body">Seine Augen leuchten dann grellblau, und sein Körper zuckt unkontrolliert.</text:p>
      <text:p text:style-name="Text_20_body"><text:span text:style-name="Strong_20_Emphasis">🌿 Dschungeljäger</text:span></text:p>
      <text:p text:style-name="Text_20_body">Vorteil auf Stealth‑Würfe im Dschungel.<text:line-break/>Kann sich als freie Aktion in Bäume schwingen und bis zu 20 ft repositionieren, ohne Gelegenheitsangriffe auszulösen.</text:p>
      <text:p text:style-name="P1"><text:span text:style-name="T1">💀 </text:span><text:span text:style-name="Strong_20_Emphasis"><text:span text:style-name="T1">Zombie‑Pirat</text:span></text:span></text:p>
      <text:p text:style-name="Text_20_body"><text:span text:style-name="Emphasis">Ehemalige Crewmitglieder, deren Körper von gequälten Geisterpiraten bewohnt werden.</text:span></text:p>
      <text:p text:style-name="Text_20_body"><text:span text:style-name="Strong_20_Emphasis">AC</text:span> 11<text:line-break/><text:span text:style-name="Strong_20_Emphasis">HP</text:span> 8 (2d8)<text:line-break/><text:span text:style-name="Strong_20_Emphasis">Bewegung</text:span> 20 ft<text:line-break/><text:span text:style-name="Strong_20_Emphasis">Angriff</text:span> Rostiges Entermesser +2 (1d6)<text:line-break/><text:span text:style-name="Strong_20_Emphasis">Moral</text:span> 10</text:p>
      <text:p text:style-name="Text_20_body"><text:span text:style-name="Strong_20_Emphasis">Besonderheiten</text:span></text:p>
      <text:list text:style-name="L10">
        <text:list-item>
          <text:p text:style-name="P20"><text:span text:style-name="Strong_20_Emphasis">Untot:</text:span> Immun gegen Gift; ignoriert kritische Treffer. </text:p>
        </text:list-item>
        <text:list-item>
          <text:p text:style-name="P20"><text:span text:style-name="Strong_20_Emphasis">Salzkonserviert:</text:span> Erleidet nur halben Schaden durch Kälte. </text:p>
        </text:list-item>
        <text:list-item>
          <text:p text:style-name="P20"><text:span text:style-name="Strong_20_Emphasis">Träge:</text:span> Bei Initiativewurf −1. </text:p>
        </text:list-item>
        <text:list-item>
          <text:p text:style-name="P21"><text:span text:style-name="Strong_20_Emphasis">Geisterzucken:</text:span> Wenn der Zombie auf 0 HP fällt, W20: </text:p>
        </text:list-item>
      </text:list>
      <text:list text:style-name="L11">
        <text:list-item>
          <text:p text:style-name="P22"><text:soft-page-break/><text:span text:style-name="Strong_20_Emphasis">18–20:</text:span> Der Geist fährt erneut in den Körper → 1 HP, steht wieder auf. </text:p>
        </text:list-item>
      </text:list>
      <text:p text:style-name="Text_20_body"><text:span text:style-name="T1">⚓ </text:span><text:span text:style-name="Strong_20_Emphasis"><text:span text:style-name="T1">Zombie‑Kapitän</text:span></text:span></text:p>
      <text:p text:style-name="Text_20_body"><text:span text:style-name="Emphasis">Ein mächtiger Untoter, halb verrottet, halb vom Splitter der Tiefe erleuchtet. Seine Augen glühen bläulich, und seine Stimme klingt wie ein ertrunkener Fluch.</text:span></text:p>
      <text:p text:style-name="Text_20_body"><text:span text:style-name="Strong_20_Emphasis">AC</text:span> 14<text:line-break/><text:span text:style-name="Strong_20_Emphasis">HP</text:span> 22 (5d8)<text:line-break/><text:span text:style-name="Strong_20_Emphasis">Bewegung</text:span> 25 ft<text:line-break/><text:span text:style-name="Strong_20_Emphasis">Angriff</text:span> Zeremoniensabel +4 (1d8+2)<text:line-break/><text:span text:style-name="Strong_20_Emphasis">Moral</text:span> 12</text:p>
      <text:p text:style-name="Text_20_body"><text:span text:style-name="Strong_20_Emphasis">Besonderheiten</text:span></text:p>
      <text:p text:style-name="Text_20_body"><text:span text:style-name="Strong_20_Emphasis">💀 Aura der Verratenen</text:span></text:p>
      <text:p text:style-name="Text_20_body">Alle Zombie‑Piraten in 20 ft erhalten:</text:p>
      <text:list text:style-name="L12">
        <text:list-item>
          <text:p text:style-name="P23">+1 auf Angriff </text:p>
        </text:list-item>
        <text:list-item>
          <text:p text:style-name="P24">Vorteil auf Moralwürfe </text:p>
        </text:list-item>
      </text:list>
      <text:p text:style-name="Text_20_body"><text:span text:style-name="Strong_20_Emphasis">🌊 Splitterberührung</text:span></text:p>
      <text:p text:style-name="Text_20_body">Bei Treffer: Ziel WIS‑Save DC 12 oder 1 Runde benommen (geistige Überwältigung).</text:p>
      <text:p text:style-name="Text_20_body"><text:span text:style-name="Strong_20_Emphasis">⚓ Ertrunkenenhieb (1×/Tag)</text:span></text:p>
      <text:p text:style-name="Text_20_body">Ein mächtiger Schlag, der Wasser aus dem Körper schleudert.</text:p>
      <text:list text:style-name="L13">
        <text:list-item>
          <text:p text:style-name="P25">Angriff +4 </text:p>
        </text:list-item>
        <text:list-item>
          <text:p text:style-name="P25">Schaden 2d8 </text:p>
        </text:list-item>
        <text:list-item>
          <text:p text:style-name="P26">Ziel wird 10 ft zurückgeschleudert. </text:p>
        </text:list-item>
      </text:list>
      <text:p text:style-name="Text_20_body"><text:span text:style-name="Strong_20_Emphasis">🩸 Unheilige Zähigkeit</text:span></text:p>
      <text:p text:style-name="Text_20_body">Wenn der Kapitän auf 0 HP fällt, würfle W20:</text:p>
      <text:list text:style-name="L14">
        <text:list-item>
          <text:p text:style-name="P27"><text:span text:style-name="Strong_20_Emphasis">19–20:</text:span> Er steht mit 1 HP wieder auf und erhält +2 auf Angriff für den Rest des Kampfes. </text:p>
        </text:list-item>
      </text:list>
      <text:p text:style-name="Text_20_body"><text:span text:style-name="T1">🧟‍♂️🧟‍♀️ </text:span><text:span text:style-name="Strong_20_Emphasis"><text:span text:style-name="T1">Fleischgolem aus Piratenleichen</text:span></text:span></text:p>
      <text:p text:style-name="Text_20_body"><text:span text:style-name="Emphasis">Ein groteskes Konstrukt aus zusammengenähten Piratenkörpern, angetrieben von der Macht des Splitters. Es riecht nach Salz, Tod und kaltem Eisen.</text:span></text:p>
      <text:p text:style-name="Text_20_body"><text:span text:style-name="Strong_20_Emphasis">AC</text:span> 15<text:line-break/><text:span text:style-name="Strong_20_Emphasis">HP</text:span> 40 (8d8)<text:line-break/><text:span text:style-name="Strong_20_Emphasis">Bewegung</text:span> 30 ft<text:line-break/><text:span text:style-name="Strong_20_Emphasis">Angriff</text:span> Doppelhieb +5 (2× 1d8+2)<text:line-break/><text:span text:style-name="Strong_20_Emphasis">Moral</text:span> 12</text:p>
      <text:p text:style-name="Text_20_body"><text:span text:style-name="Strong_20_Emphasis">Besonderheiten</text:span></text:p>
      <text:p text:style-name="Text_20_body"><text:span text:style-name="Strong_20_Emphasis">🧩 Zusammengesetzt aus vielen</text:span></text:p>
      <text:p text:style-name="Text_20_body">Resistenzen:</text:p>
      <text:list text:style-name="L15">
        <text:list-item>
          <text:p text:style-name="P28">Halber Schaden durch nichtmagische Waffen </text:p>
        </text:list-item>
        <text:list-item>
          <text:p text:style-name="P29"><text:soft-page-break/>Immun gegen Gift, Kälte, Erschöpfung </text:p>
        </text:list-item>
      </text:list>
      <text:p text:style-name="Text_20_body"><text:span text:style-name="Strong_20_Emphasis">💀 Leichenregen (1×/Tag)</text:span></text:p>
      <text:p text:style-name="Text_20_body">Der Golem schleudert Körperteile in einem 15‑ft‑Kegel.</text:p>
      <text:list text:style-name="L16">
        <text:list-item>
          <text:p text:style-name="P30">Alle Ziele: DEX‑Save DC 13 </text:p>
        </text:list-item>
        <text:list-item>
          <text:p text:style-name="P30">Bei Misserfolg: 2d6 Schaden + 1 Runde benommen </text:p>
        </text:list-item>
        <text:list-item>
          <text:p text:style-name="P31">Bei Erfolg: halber Schaden </text:p>
        </text:list-item>
      </text:list>
      <text:p text:style-name="Text_20_body"><text:span text:style-name="Strong_20_Emphasis">🧟 Wiederanheften</text:span></text:p>
      <text:p text:style-name="Text_20_body">Wenn der Golem Schaden erleidet, kann er als Reaktion einen Zombie‑Pirat aus seinem Körper lösen:</text:p>
      <text:list text:style-name="L17">
        <text:list-item>
          <text:p text:style-name="P32">Der Zombie fällt zu Boden (1 HP) </text:p>
        </text:list-item>
        <text:list-item>
          <text:p text:style-name="P33">Der Golem reduziert den erlittenen Schaden um 1d6 </text:p>
        </text:list-item>
      </text:list>
      <text:p text:style-name="Text_20_body">(Maximal 3 Zombies pro Kampf)</text:p>
      <text:p text:style-name="Text_20_body"><text:span text:style-name="Strong_20_Emphasis">🌊 Splitterpuls</text:span></text:p>
      <text:p text:style-name="Text_20_body">Jede Runde zu Beginn seines Zuges:</text:p>
      <text:list text:style-name="L18">
        <text:list-item>
          <text:p text:style-name="P34">Alle Kreaturen in 10 ft WIS‑Save DC 12 oder 1d4 nekrotischer Schaden. </text:p>
        </text:list-item>
      </text:list>
      <text:p text:style-name="Text_20_body"><text:span text:style-name="Strong_20_Emphasis">🪓 Berserkerphase (unter 10 HP)</text:span></text:p>
      <text:list text:style-name="L19">
        <text:list-item>
          <text:p text:style-name="P35">+2 auf Angriff </text:p>
        </text:list-item>
        <text:list-item>
          <text:p text:style-name="P35">+2 Schaden </text:p>
        </text:list-item>
        <text:list-item>
          <text:p text:style-name="P35">Vorteil auf alle Angriffe </text:p>
        </text:list-item>
        <text:list-item>
          <text:p text:style-name="P36">Kann nicht fliehen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⚔️ ENCOUNTER-STATBLOCKS – Abenteuer II</text:p>
      <text:p text:style-name="P1"><text:span text:style-name="Strong_20_Emphasis">1. Geisterpirat (Untoter)</text:span></text:p>
      <text:p text:style-name="P1"><text:span text:style-name="Strong_20_Emphasis">AC</text:span> 14<text:line-break/><text:span text:style-name="Strong_20_Emphasis">HP</text:span> 10 (3d6)<text:line-break/><text:span text:style-name="Strong_20_Emphasis">Bewegung</text:span> 30 ft, Fliegen 30 ft (schwebend)<text:line-break/><text:span text:style-name="Strong_20_Emphasis">Angriff</text:span> Geisterklinge +3 (1d6 + 1d4 Nekrotisch)<text:line-break/><text:span text:style-name="Strong_20_Emphasis">Moral</text:span> 12</text:p>
      <text:p text:style-name="P1"><text:span text:style-name="Strong_20_Emphasis">Besonderheiten:</text:span></text:p>
      <text:list text:style-name="L20">
        <text:list-item>
          <text:p text:style-name="P37"><text:span text:style-name="Strong_20_Emphasis">Durchscheinend:</text:span> 50% Chance, dass physische Angriffe ihn verfehlen (W20 ≥ 11). </text:p>
        </text:list-item>
        <text:list-item>
          <text:p text:style-name="P37"><text:span text:style-name="Strong_20_Emphasis">Fluch der Tiefe:</text:span> Bei Treffer muss Ziel WIS-Save DC 12 bestehen oder 1 Runde verängstigt sein. </text:p>
        </text:list-item>
        <text:list-item>
          <text:p text:style-name="P38"><text:span text:style-name="Strong_20_Emphasis">Bindung:</text:span> Kann nicht weiter als 100 ft von seinem verfluchten Ankerobjekt entfernt agieren. </text:p>
        </text:list-item>
      </text:list>
      <text:p text:style-name="P1"><text:span text:style-name="Strong_20_Emphasis">2. Kultist der Schwarzen See</text:span></text:p>
      <text:p text:style-name="P1"><text:span text:style-name="Strong_20_Emphasis">AC</text:span> 13<text:line-break/><text:span text:style-name="Strong_20_Emphasis">HP</text:span> 8 (2d8)<text:line-break/><text:span text:style-name="Strong_20_Emphasis">Bewegung</text:span> 30 ft<text:line-break/><text:span text:style-name="Strong_20_Emphasis">Angriff</text:span> Ritualdolch +2 (1d4 + 1d4 Nekrotisch)<text:line-break/><text:span text:style-name="Strong_20_Emphasis">Moral</text:span> 9</text:p>
      <text:p text:style-name="P1"><text:span text:style-name="Strong_20_Emphasis">Besonderheiten:</text:span></text:p>
      <text:list text:style-name="L21">
        <text:list-item>
          <text:p text:style-name="P39"><text:span text:style-name="Strong_20_Emphasis">Fanatisch:</text:span> Wenn HP &lt; 4, Vorteil auf Angriffswürfe. </text:p>
        </text:list-item>
        <text:list-item>
          <text:p text:style-name="P39"><text:span text:style-name="Strong_20_Emphasis">Ritualflüstern:</text:span> Kann 1x/Tag einen SC mit dunklen Visionen belegen (WIS-Save DC 13, bei Fehlschlag: Nachteil auf nächste Aktion). </text:p>
        </text:list-item>
        <text:list-item>
          <text:p text:style-name="P40"><text:span text:style-name="Strong_20_Emphasis">Blutopfer:</text:span> Kann sich selbst 1d4 Schaden zufügen, um +2 auf nächsten Angriff zu erhalten. </text:p>
        </text:list-item>
      </text:list>
      <text:p text:style-name="P1"><text:span text:style-name="Strong_20_Emphasis">3. Wahrsagerin der Möwe (NSC oder Gegner)</text:span></text:p>
      <text:p text:style-name="P1"><text:span text:style-name="Strong_20_Emphasis">AC</text:span> 12<text:line-break/><text:span text:style-name="Strong_20_Emphasis">HP</text:span> 6 (2d6)<text:line-break/><text:span text:style-name="Strong_20_Emphasis">Bewegung</text:span> 30 ft<text:line-break/><text:span text:style-name="Strong_20_Emphasis">Angriff</text:span> Keine – nutzt Magie oder Flucht<text:line-break/><text:span text:style-name="Strong_20_Emphasis">Moral</text:span> 10</text:p>
      <text:p text:style-name="P1"><text:span text:style-name="Strong_20_Emphasis">Besonderheiten:</text:span></text:p>
      <text:list text:style-name="L22">
        <text:list-item>
          <text:p text:style-name="P41"><text:span text:style-name="Strong_20_Emphasis">Visionen:</text:span> Kann SC eine kryptische Prophezeiung geben (Plot-Hook). </text:p>
        </text:list-item>
        <text:list-item>
          <text:p text:style-name="P41"><text:span text:style-name="Strong_20_Emphasis">Geisterkontakt:</text:span> Kann mit Geistern sprechen, aber wird dabei selbst verwundbar. </text:p>
        </text:list-item>
        <text:list-item>
          <text:p text:style-name="P42"><text:span text:style-name="Strong_20_Emphasis">Verfluchung:</text:span> 1x/Tag kann sie einen SC verfluchen (WIS-Save DC 14, bei Fehlschlag: −1 auf alle Saves für 1 Stunde). </text:p>
        </text:list-item>
      </text:list>
      <text:p text:style-name="P1"><text:span text:style-name="Strong_20_Emphasis">4. Untoter Wächter der Gruft</text:span></text:p>
      <text:p text:style-name="P1"><text:span text:style-name="Strong_20_Emphasis">AC</text:span> 15<text:line-break/><text:span text:style-name="Strong_20_Emphasis">HP</text:span> 12 (3d8)<text:line-break/><text:span text:style-name="Strong_20_Emphasis">Bewegung</text:span> 25 ft<text:line-break/><text:soft-page-break/><text:span text:style-name="Strong_20_Emphasis">Angriff</text:span> Gruftschwert +4 (1d8)<text:line-break/><text:span text:style-name="Strong_20_Emphasis">Moral</text:span> 11</text:p>
      <text:p text:style-name="P1"><text:span text:style-name="Strong_20_Emphasis">Besonderheiten:</text:span></text:p>
      <text:list text:style-name="L23">
        <text:list-item>
          <text:p text:style-name="P43"><text:span text:style-name="Strong_20_Emphasis">Grabesstille:</text:span> SC in 10 ft Umkreis können nicht sprechen oder zaubern mit verbalen Komponenten. </text:p>
        </text:list-item>
        <text:list-item>
          <text:p text:style-name="P43"><text:span text:style-name="Strong_20_Emphasis">Unnachgiebig:</text:span> Immun gegen Furcht und Kontrolle. </text:p>
        </text:list-item>
        <text:list-item>
          <text:p text:style-name="P44"><text:span text:style-name="Strong_20_Emphasis">Gruftbindung:</text:span> Wenn der Sarkophag beschädigt wird, wird der Wächter rasend (+2 Schaden). </text:p>
        </text:list-item>
      </text:list>
      <text:p text:style-name="P1"><text:span text:style-name="Strong_20_Emphasis">5. Vision des Ersten Piraten (Illusion)</text:span></text:p>
      <text:p text:style-name="P1"><text:span text:style-name="Strong_20_Emphasis">AC</text:span> –<text:line-break/><text:span text:style-name="Strong_20_Emphasis">HP</text:span> –<text:line-break/><text:span text:style-name="Strong_20_Emphasis">Bewegung</text:span> –<text:line-break/><text:span text:style-name="Strong_20_Emphasis">Angriff</text:span> –<text:line-break/><text:span text:style-name="Strong_20_Emphasis">Moral</text:span> –</text:p>
      <text:p text:style-name="P1"><text:span text:style-name="Strong_20_Emphasis">Effekt:</text:span></text:p>
      <text:list text:style-name="L24">
        <text:list-item>
          <text:p text:style-name="P45">Erscheint als geisterhafte Projektion. </text:p>
        </text:list-item>
        <text:list-item>
          <text:p text:style-name="P45">SC müssen WIS-Save DC 13 bestehen oder 1 Runde lang gelähmt vor Ehrfurcht. </text:p>
        </text:list-item>
        <text:list-item>
          <text:p text:style-name="P46">Kann Hinweise geben oder SC segnen (Inspiration, Vorteil auf nächsten Save). </text:p>
        </text:list-item>
      </text:list>
      <text:p text:style-name="P1"><text:span text:style-name="Strong_20_Emphasis">6. Geisterhafte Tentakel der Schwarzen See</text:span></text:p>
      <text:p text:style-name="P1"><text:span text:style-name="Strong_20_Emphasis">AC</text:span> 14<text:line-break/><text:span text:style-name="Strong_20_Emphasis">HP</text:span> 10 (3d6)<text:line-break/><text:span text:style-name="Strong_20_Emphasis">Bewegung</text:span> 30 ft (nur in Wasser oder Nebel)<text:line-break/><text:span text:style-name="Strong_20_Emphasis">Angriff</text:span> Tentakelgriff +3 (1d6 + Umklammern)<text:line-break/><text:span text:style-name="Strong_20_Emphasis">Moral</text:span> 12</text:p>
      <text:p text:style-name="P1"><text:span text:style-name="Strong_20_Emphasis">Besonderheiten:</text:span></text:p>
      <text:list text:style-name="L25">
        <text:list-item>
          <text:p text:style-name="P47"><text:span text:style-name="Strong_20_Emphasis">Umklammern:</text:span> STR-Save DC 13 oder festgehalten. </text:p>
        </text:list-item>
        <text:list-item>
          <text:p text:style-name="P47"><text:span text:style-name="Strong_20_Emphasis">Seelenzehrung:</text:span> Bei Treffer verliert Ziel zusätzlich 1d4 max HP bis zur nächsten langen Rast. </text:p>
        </text:list-item>
        <text:list-item>
          <text:p text:style-name="P48"><text:span text:style-name="Strong_20_Emphasis">Nebelbindung:</text:span> Kann nur in Nebel oder Wasser existieren – bei Sonnenlicht zerfällt sie. </text:p>
        </text:list-item>
      </text:list>
      <text:p text:style-name="P1"><text:span text:style-name="Strong_20_Emphasis">7. Geist des Ersten Piraten (Boss-NSC)</text:span></text:p>
      <text:p text:style-name="P1"><text:span text:style-name="Strong_20_Emphasis">AC</text:span> 16<text:line-break/><text:span text:style-name="Strong_20_Emphasis">HP</text:span> 24 (6d8)<text:line-break/><text:span text:style-name="Strong_20_Emphasis">Bewegung</text:span> 30 ft, Fliegen 30 ft<text:line-break/><text:span text:style-name="Strong_20_Emphasis">Angriff</text:span></text:p>
      <text:list text:style-name="L26">
        <text:list-item>
          <text:p text:style-name="P49">Geistersäbel +5 (1d10 + 1d4 Nekrotisch) </text:p>
        </text:list-item>
        <text:list-item>
          <text:p text:style-name="P50">Blick der Verdammnis (WIS-Save DC 14, bei Fehlschlag: 1d6 psychischer Schaden + Verängstigung) </text:p>
        </text:list-item>
      </text:list>
      <text:p text:style-name="P1"><text:span text:style-name="Strong_20_Emphasis">Moral</text:span> 13</text:p>
      <text:p text:style-name="P1"><text:span text:style-name="Strong_20_Emphasis">Besonderheiten:</text:span></text:p>
      <text:list text:style-name="L27">
        <text:list-item>
          <text:p text:style-name="P51"><text:soft-page-break/><text:span text:style-name="Strong_20_Emphasis">Legendär:</text:span> Kann 1x/Tag einen SC segnen oder verfluchen. </text:p>
        </text:list-item>
        <text:list-item>
          <text:p text:style-name="P51"><text:span text:style-name="Strong_20_Emphasis">Wahrheitsträger:</text:span> Kann SC die Wahrheit über das Ritual zeigen (Plot-Entscheidung). </text:p>
        </text:list-item>
        <text:list-item>
          <text:p text:style-name="P52"><text:span text:style-name="Strong_20_Emphasis">Unsterblich:</text:span> Kann nur besiegt werden, wenn sein Herz (Artefakt) zerstört wird. </text:p>
        </text:list-item>
      </text:list>
      <text:p text:style-name="P1"/>
      <text:p text:style-name="P1"><text:span text:style-name="Emphasis"/></text:p>
      <text:p text:style-name="P1"/>
      <text:p text:style-name="P1">⚔️ <text:span text:style-name="Strong_20_Emphasis">ENCOUNTER‑STATBLOCKS – Abenteuer III</text:span></text:p>
      <text:p text:style-name="P1"><text:span text:style-name="Strong_20_Emphasis">1. Sturmgeist (Elementar)</text:span></text:p>
      <text:p text:style-name="P1"><text:span text:style-name="Emphasis">Ein Vorbote der Schwarzen See, geboren aus Wind, Donner und Flüsterstimmen.</text:span></text:p>
      <text:p text:style-name="P1"><text:span text:style-name="Strong_20_Emphasis">AC</text:span> 15<text:line-break/><text:span text:style-name="Strong_20_Emphasis">HP</text:span> 18 (4d8)<text:line-break/><text:span text:style-name="Strong_20_Emphasis">Bewegung</text:span> 40 ft, Fliegen 40 ft<text:line-break/><text:span text:style-name="Strong_20_Emphasis">Angriff</text:span></text:p>
      <text:list text:style-name="L28">
        <text:list-item>
          <text:p text:style-name="P53">Blitzschlag +4 (1d8 Blitz) </text:p>
        </text:list-item>
        <text:list-item>
          <text:p text:style-name="P54">Windklinge +4 (1d6 Schneiden) </text:p>
        </text:list-item>
      </text:list>
      <text:p text:style-name="P1"><text:span text:style-name="Strong_20_Emphasis">Moral</text:span> 12</text:p>
      <text:p text:style-name="P1"><text:span text:style-name="Strong_20_Emphasis">Besonderheiten:</text:span></text:p>
      <text:list text:style-name="L29">
        <text:list-item>
          <text:p text:style-name="P55"><text:span text:style-name="Strong_20_Emphasis">Sturmform:</text:span> Immun gegen nichtmagische Waffen. </text:p>
        </text:list-item>
        <text:list-item>
          <text:p text:style-name="P55"><text:span text:style-name="Strong_20_Emphasis">Donnerstoß (1/Tag):</text:span> Alle Kreaturen in 20 ft, DEX‑Save DC 13 oder 1d8 Donner + zu Boden geworfen. </text:p>
        </text:list-item>
        <text:list-item>
          <text:p text:style-name="P56"><text:span text:style-name="Strong_20_Emphasis">Windstoß:</text:span> Kann eine Kreatur 10 ft zurückschleudern (STR‑Save DC 12). </text:p>
        </text:list-item>
      </text:list>
      <text:p text:style-name="P1"><text:span text:style-name="Strong_20_Emphasis">2. Kultist der Tiefe (Fanatiker)</text:span></text:p>
      <text:p text:style-name="P1"><text:span text:style-name="Emphasis">Diener des Rituals, bereit, sich selbst zu opfern.</text:span></text:p>
      <text:p text:style-name="P1"><text:span text:style-name="Strong_20_Emphasis">AC</text:span> 13<text:line-break/><text:span text:style-name="Strong_20_Emphasis">HP</text:span> 10 (3d6)<text:line-break/><text:span text:style-name="Strong_20_Emphasis">Bewegung</text:span> 30 ft<text:line-break/><text:span text:style-name="Strong_20_Emphasis">Angriff</text:span> Ritualdolch +3 (1d4 + 1d4 Nekrotisch)<text:line-break/><text:span text:style-name="Strong_20_Emphasis">Moral</text:span> 10</text:p>
      <text:p text:style-name="P1"><text:span text:style-name="Strong_20_Emphasis">Besonderheiten:</text:span></text:p>
      <text:list text:style-name="L30">
        <text:list-item>
          <text:p text:style-name="P57"><text:span text:style-name="Strong_20_Emphasis">Blutopfer:</text:span> Kann sich selbst 1d4 Schaden zufügen, um +2 auf den nächsten Angriff zu erhalten. </text:p>
        </text:list-item>
        <text:list-item>
          <text:p text:style-name="P57"><text:span text:style-name="Strong_20_Emphasis">Tiefenflüstern:</text:span> WIS‑Save DC 13 oder Ziel erhält Nachteil auf nächste Aktion. </text:p>
        </text:list-item>
        <text:list-item>
          <text:p text:style-name="P58"><text:span text:style-name="Strong_20_Emphasis">Fanatische Hingabe:</text:span> Stirbt erst bei −5 HP (kämpft weiter bis dahin). </text:p>
        </text:list-item>
      </text:list>
      <text:p text:style-name="P1"><text:span text:style-name="Strong_20_Emphasis">3. Geister der Verdammten (Schwarm‑Untote)</text:span></text:p>
      <text:p text:style-name="P1"><text:span text:style-name="Emphasis">Die Seelen derer, die das Ritual einst versuchten.</text:span></text:p>
      <text:p text:style-name="P1"><text:span text:style-name="Strong_20_Emphasis">AC</text:span> 14<text:line-break/><text:span text:style-name="Strong_20_Emphasis">HP</text:span> 16 (4d6)<text:line-break/><text:soft-page-break/><text:span text:style-name="Strong_20_Emphasis">Bewegung</text:span> 30 ft, Fliegen 20 ft<text:line-break/><text:span text:style-name="Strong_20_Emphasis">Angriff</text:span> Seelenkrallen +4 (1d6 + 1d4 Nekrotisch)<text:line-break/><text:span text:style-name="Strong_20_Emphasis">Moral</text:span> 12</text:p>
      <text:p text:style-name="P1"><text:span text:style-name="Strong_20_Emphasis">Besonderheiten:</text:span></text:p>
      <text:list text:style-name="L31">
        <text:list-item>
          <text:p text:style-name="P59"><text:span text:style-name="Strong_20_Emphasis">Schwarm:</text:span> Resistenz gegen Stich- und Hiebschaden. </text:p>
        </text:list-item>
        <text:list-item>
          <text:p text:style-name="P59"><text:span text:style-name="Strong_20_Emphasis">Seelenzehrung:</text:span> Bei Treffer verliert Ziel 1d4 max HP bis zur nächsten langen Rast. </text:p>
        </text:list-item>
        <text:list-item>
          <text:p text:style-name="P60"><text:span text:style-name="Strong_20_Emphasis">Klagelaute:</text:span> Alle in 10 ft, WIS‑Save DC 12 oder 1 Runde verängstigt. </text:p>
        </text:list-item>
      </text:list>
      <text:p text:style-name="P1"><text:span text:style-name="Strong_20_Emphasis">4. Leviathan‑Avatar (Großer Endgegner)</text:span></text:p>
      <text:p text:style-name="P1"><text:span text:style-name="Emphasis">Ein Aspekt des uralten Meeresgottes, der das Ritual überwacht.</text:span></text:p>
      <text:p text:style-name="P1"><text:span text:style-name="Strong_20_Emphasis">AC</text:span> 17<text:line-break/><text:span text:style-name="Strong_20_Emphasis">HP</text:span> 45 (10d8)<text:line-break/><text:span text:style-name="Strong_20_Emphasis">Bewegung</text:span> 40 ft, Schwimmen 60 ft<text:line-break/><text:span text:style-name="Strong_20_Emphasis">Angriff</text:span></text:p>
      <text:list text:style-name="L32">
        <text:list-item>
          <text:p text:style-name="P61">Tentakel +6 (1d10 + Umklammern) </text:p>
        </text:list-item>
        <text:list-item>
          <text:p text:style-name="P62">Biss +6 (1d12) </text:p>
        </text:list-item>
      </text:list>
      <text:p text:style-name="P1"><text:span text:style-name="Strong_20_Emphasis">Moral</text:span> 14</text:p>
      <text:p text:style-name="P1"><text:span text:style-name="Strong_20_Emphasis">Besonderheiten:</text:span></text:p>
      <text:list text:style-name="L33">
        <text:list-item>
          <text:p text:style-name="P63"><text:span text:style-name="Strong_20_Emphasis">Umklammern:</text:span> STR‑Save DC 14 oder festgehalten. </text:p>
        </text:list-item>
        <text:list-item>
          <text:p text:style-name="P63"><text:span text:style-name="Strong_20_Emphasis">Tiefenblick:</text:span> WIS‑Save DC 14 oder 1 Runde gelähmt. </text:p>
        </text:list-item>
        <text:list-item>
          <text:p text:style-name="P63"><text:span text:style-name="Strong_20_Emphasis">Wasserherrschaft:</text:span> Kann 1x/Tag eine 20‑ft‑Welle beschwören (2d6 Schaden, DEX‑Save DC 13 halbiert). </text:p>
        </text:list-item>
        <text:list-item>
          <text:p text:style-name="P64"><text:span text:style-name="Strong_20_Emphasis">Avatarform:</text:span> Wenn auf 0 HP, zerfällt er zu Wasser — kehrt nach 1 Stunde zurück, außer der Splitter wird zerstört. </text:p>
        </text:list-item>
      </text:list>
      <text:p text:style-name="P1"><text:span text:style-name="Strong_20_Emphasis">5. Kapitän Rauthorn – Ritualform (Boss)</text:span></text:p>
      <text:p text:style-name="P1"><text:span text:style-name="Emphasis">Vom Ritual verändert, halb Mensch, halb Geist.</text:span></text:p>
      <text:p text:style-name="P1"><text:span text:style-name="Strong_20_Emphasis">AC</text:span> 16<text:line-break/><text:span text:style-name="Strong_20_Emphasis">HP</text:span> 30 (7d8)<text:line-break/><text:span text:style-name="Strong_20_Emphasis">Bewegung</text:span> 30 ft<text:line-break/><text:span text:style-name="Strong_20_Emphasis">Angriff</text:span></text:p>
      <text:list text:style-name="L34">
        <text:list-item>
          <text:p text:style-name="P65">Verdammnisklinge +5 (1d10 + 1d4 Nekrotisch) </text:p>
        </text:list-item>
        <text:list-item>
          <text:p text:style-name="P66">Seelenstoß (Fernkampf, 30 ft) +4 (1d8 psychisch) </text:p>
        </text:list-item>
      </text:list>
      <text:p text:style-name="P1"><text:span text:style-name="Strong_20_Emphasis">Moral</text:span> 13</text:p>
      <text:p text:style-name="P1"><text:span text:style-name="Strong_20_Emphasis">Besonderheiten:</text:span></text:p>
      <text:list text:style-name="L35">
        <text:list-item>
          <text:p text:style-name="P67"><text:span text:style-name="Strong_20_Emphasis">Unsterblichkeitsdrang:</text:span> Wenn er auf 0 HP fällt, W20: bei 11+ steht er mit 1 HP wieder auf. </text:p>
        </text:list-item>
        <text:list-item>
          <text:p text:style-name="P67"><text:span text:style-name="Strong_20_Emphasis">Ritualmacht:</text:span> 1x/Tag kann er einen SC verfluchen (WIS‑Save DC 14, bei Fehlschlag: −2 auf alle Würfe für 1 Stunde). </text:p>
        </text:list-item>
        <text:list-item>
          <text:p text:style-name="P67"><text:span text:style-name="Strong_20_Emphasis">Bann der See:</text:span> SC in 10 ft haben Nachteil auf Rettungswürfe. </text:p>
        </text:list-item>
        <text:list-item>
          <text:p text:style-name="P68"><text:span text:style-name="Strong_20_Emphasis">Seelenbindung:</text:span> Wird stärker, wenn SC sterben (+1 Schaden pro totem SC). </text:p>
        </text:list-item>
      </text:list>
      <text:p text:style-name="P1"><text:soft-page-break/><text:span text:style-name="Strong_20_Emphasis">6. Ritualphänomen: Riss der Schwarzen See</text:span></text:p>
      <text:p text:style-name="P1"><text:span text:style-name="Emphasis">Kein Monster, sondern ein gefährliches Umweltereignis.</text:span></text:p>
      <text:p text:style-name="P1"><text:span text:style-name="Strong_20_Emphasis">Effekt:</text:span></text:p>
      <text:list text:style-name="L36">
        <text:list-item>
          <text:p text:style-name="P69">Öffnet sich zufällig im Ritualkreis. </text:p>
        </text:list-item>
        <text:list-item>
          <text:p text:style-name="P69">Jede Kreatur in 10 ft: DEX‑Save DC 13 oder 2d6 Nekrotisch + 10 ft hineingezogen. </text:p>
        </text:list-item>
        <text:list-item>
          <text:p text:style-name="P69">Bei 3 Fehlschlägen wird eine Kreatur verschlungen (verschwindet in der Schwarzen See). </text:p>
        </text:list-item>
        <text:list-item>
          <text:p text:style-name="P70">Kann durch Zerstörung des Splitters geschlossen werden. </text:p>
        </text:list-item>
      </text:list>
      <text:p text:style-name="P1"><text:span text:style-name="Strong_20_Emphasis">7. Blutopfer‑Horror (Beschworenes Wesen)</text:span></text:p>
      <text:p text:style-name="P1"><text:span text:style-name="Emphasis">Erscheint, wenn das Ritual Opfer fordert.</text:span></text:p>
      <text:p text:style-name="P1"><text:span text:style-name="Strong_20_Emphasis">AC</text:span> 15<text:line-break/><text:span text:style-name="Strong_20_Emphasis">HP</text:span> 20 (5d6)<text:line-break/><text:span text:style-name="Strong_20_Emphasis">Bewegung</text:span> 30 ft<text:line-break/><text:span text:style-name="Strong_20_Emphasis">Angriff</text:span> Blutpeitsche +4 (1d8 + Blutung)<text:line-break/><text:span text:style-name="Strong_20_Emphasis">Moral</text:span> 12</text:p>
      <text:p text:style-name="P1"><text:span text:style-name="Strong_20_Emphasis">Besonderheiten:</text:span></text:p>
      <text:list text:style-name="L37">
        <text:list-item>
          <text:p text:style-name="P71"><text:span text:style-name="Strong_20_Emphasis">Blutung:</text:span> Ziel verliert 1 HP pro Runde, bis es eine Aktion zum Stoppen nutzt. </text:p>
        </text:list-item>
        <text:list-item>
          <text:p text:style-name="P71"><text:span text:style-name="Strong_20_Emphasis">Blutdurst:</text:span> Greift immer die verwundete Kreatur mit den wenigsten HP an. </text:p>
        </text:list-item>
        <text:list-item>
          <text:p text:style-name="P72"><text:span text:style-name="Strong_20_Emphasis">Ritualbindung:</text:span> Wird schwächer, wenn SC das Blut des Ersten Piraten zerstören (−2 auf alle Angriffe). </text:p>
        </text:list-item>
      </text:list>
      <text:p text:style-name="P1"><text:span text:style-name="Strong_20_Emphasis">8. Schatten der Zukunft (Vision‑Gegner)</text:span></text:p>
      <text:p text:style-name="P1"><text:span text:style-name="Emphasis">Eine Manifestation dessen, was die SC werden könnten.</text:span></text:p>
      <text:p text:style-name="P1"><text:span text:style-name="Strong_20_Emphasis">AC</text:span> 14<text:line-break/><text:span text:style-name="Strong_20_Emphasis">HP</text:span> 12 (3d8)<text:line-break/><text:span text:style-name="Strong_20_Emphasis">Bewegung</text:span> 30 ft<text:line-break/><text:span text:style-name="Strong_20_Emphasis">Angriff</text:span> Schattenklinge +4 (1d6 + 1d4 Nekrotisch)<text:line-break/><text:span text:style-name="Strong_20_Emphasis">Moral</text:span> 10</text:p>
      <text:p text:style-name="P1"><text:span text:style-name="Strong_20_Emphasis">Besonderheiten:</text:span></text:p>
      <text:list text:style-name="L38">
        <text:list-item>
          <text:p text:style-name="P73"><text:span text:style-name="Strong_20_Emphasis">Spiegelung:</text:span> Hat die gleiche AC wie der SC, den er imitiert (min. 14). </text:p>
        </text:list-item>
        <text:list-item>
          <text:p text:style-name="P73"><text:span text:style-name="Strong_20_Emphasis">Zukunftsschmerz:</text:span> Bei Treffer: Ziel verliert 1d4 max HP. </text:p>
        </text:list-item>
        <text:list-item>
          <text:p text:style-name="P74"><text:span text:style-name="Strong_20_Emphasis">Unwirklich:</text:span> 25% Chance, dass Angriffe ihn verfehlen. </text:p>
        </text:list-item>
      </text:list>
      <text:p text:style-name="P1">Wenn du möchtest, kann ich dir als Nächstes <text:span text:style-name="Strong_20_Emphasis">eine Ritualkarte</text:span>, <text:span text:style-name="Strong_20_Emphasis">ein PDF aller Statblocks</text:span>, oder <text:span text:style-name="Strong_20_Emphasis">eine finale Abschlussrede des Kapitäns</text:span> erstellen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21:07:37.987949600</meta:creation-date>
    <dc:date>2026-01-30T16:45:42.551127200</dc:date>
    <meta:editing-duration>PT15M20S</meta:editing-duration>
    <meta:editing-cycles>7</meta:editing-cycles>
    <meta:generator>LibreOffice/25.2.7.2$Windows_X86_64 LibreOffice_project/5cbfd1ab6520636bb5f7b99185aa69bd7456825d</meta:generator>
    <meta:document-statistic meta:table-count="0" meta:image-count="0" meta:object-count="0" meta:page-count="10" meta:paragraph-count="238" meta:word-count="2056" meta:character-count="12781" meta:non-whitespace-character-count="10953"/>
  </office:meta>
</office:document-meta>
</file>