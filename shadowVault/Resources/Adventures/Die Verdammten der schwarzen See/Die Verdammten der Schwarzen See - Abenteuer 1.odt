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103cm" fo:margin-left="0cm" table:align="left"/>
    </style:style>
    <style:style style:name="Tabelle1.A" style:family="table-column">
      <style:table-column-properties style:column-width="1.887cm"/>
    </style:style>
    <style:style style:name="Tabelle1.B" style:family="table-column">
      <style:table-column-properties style:column-width="15.215cm"/>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10c17f"/>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able_20_Contents">
      <style:text-properties officeooo:rsid="0010d7b2" officeooo:paragraph-rsid="0010d7b2"/>
    </style:style>
    <style:style style:name="P7" style:family="paragraph" style:parent-style-name="Table_20_Contents">
      <style:text-properties officeooo:rsid="0019f5bf" officeooo:paragraph-rsid="0019f5bf"/>
    </style:style>
    <style:style style:name="P8" style:family="paragraph" style:parent-style-name="Table_20_Contents">
      <style:text-properties officeooo:rsid="001b0120" officeooo:paragraph-rsid="001b0120"/>
    </style:style>
    <style:style style:name="P9" style:family="paragraph" style:parent-style-name="Text_20_body">
      <style:paragraph-properties fo:orphans="0" fo:widows="0"/>
    </style:style>
    <style:style style:name="P10" style:family="paragraph" style:parent-style-name="Text_20_body">
      <style:text-properties officeooo:rsid="001b0120" officeooo:paragraph-rsid="001b0120"/>
    </style:style>
    <style:style style:name="P11" style:family="paragraph" style:parent-style-name="Text_20_body" style:list-style-name="L3">
      <style:text-properties officeooo:paragraph-rsid="002db8b2"/>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paragraph-properties fo:margin-top="0cm" fo:margin-bottom="0cm" style:contextual-spacing="false"/>
      <style:text-properties officeooo:rsid="002db8b2" officeooo:paragraph-rsid="002db8b2"/>
    </style:style>
    <style:style style:name="P15" style:family="paragraph" style:parent-style-name="Text_20_body" style:list-style-name="L5">
      <style:paragraph-properties fo:margin-top="0cm" fo:margin-bottom="0cm" style:contextual-spacing="false"/>
      <style:text-properties officeooo:paragraph-rsid="002db8b2"/>
    </style:style>
    <style:style style:name="P16" style:family="paragraph" style:parent-style-name="Text_20_body" style:list-style-name="L5"/>
    <style:style style:name="P17" style:family="paragraph" style:parent-style-name="Text_20_body" style:list-style-name="L5">
      <style:text-properties officeooo:rsid="002db8b2" officeooo:paragraph-rsid="002db8b2"/>
    </style:style>
    <style:style style:name="P18" style:family="paragraph" style:parent-style-name="Text_20_body">
      <style:text-properties officeooo:paragraph-rsid="00136977"/>
    </style:style>
    <style:style style:name="P19" style:family="paragraph" style:parent-style-name="Text_20_body">
      <style:text-properties officeooo:paragraph-rsid="0018c886"/>
    </style:style>
    <style:style style:name="P20" style:family="paragraph" style:parent-style-name="Text_20_body">
      <style:text-properties officeooo:paragraph-rsid="0020be1f"/>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text-properties officeooo:paragraph-rsid="001e19c9"/>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8">
      <style:paragraph-properties fo:margin-top="0cm" fo:margin-bottom="0cm" style:contextual-spacing="false"/>
      <style:text-properties officeooo:rsid="001f15b5" officeooo:paragraph-rsid="001f15b5"/>
    </style:style>
    <style:style style:name="P28" style:family="paragraph" style:parent-style-name="Text_20_body" style:list-style-name="L8">
      <style:paragraph-properties fo:margin-top="0cm" fo:margin-bottom="0cm" style:contextual-spacing="false"/>
      <style:text-properties officeooo:paragraph-rsid="001f15b5"/>
    </style:style>
    <style:style style:name="P29" style:family="paragraph" style:parent-style-name="Text_20_body">
      <style:text-properties officeooo:paragraph-rsid="0020ac3c"/>
    </style:style>
    <style:style style:name="P30" style:family="paragraph" style:parent-style-name="Text_20_body" style:list-style-name="L8">
      <style:paragraph-properties fo:margin-top="0cm" fo:margin-bottom="0cm" style:contextual-spacing="false"/>
      <style:text-properties officeooo:rsid="001f15b5" officeooo:paragraph-rsid="0020ac3c"/>
    </style:style>
    <style:style style:name="P31" style:family="paragraph" style:parent-style-name="Text_20_body">
      <style:paragraph-properties fo:margin-top="0cm" fo:margin-bottom="0cm" style:contextual-spacing="false"/>
      <style:text-properties officeooo:rsid="001f15b5" officeooo:paragraph-rsid="0020ac3c"/>
    </style:style>
    <style:style style:name="P32" style:family="paragraph" style:parent-style-name="Text_20_body">
      <style:text-properties fo:font-weight="bold" officeooo:rsid="002a3cdb" officeooo:paragraph-rsid="002a3cdb" style:font-weight-asian="bold" style:font-weight-complex="bold"/>
    </style:style>
    <style:style style:name="P33" style:family="paragraph" style:parent-style-name="Text_20_body">
      <style:text-properties officeooo:rsid="002a3cdb" officeooo:paragraph-rsid="002a3cdb"/>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text-properties officeooo:paragraph-rsid="002a3cdb"/>
    </style:style>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0"/>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1"/>
    <style:style style:name="P41" style:family="paragraph" style:parent-style-name="Text_20_body" style:list-style-name="L12">
      <style:paragraph-properties fo:margin-top="0cm" fo:margin-bottom="0cm" style:contextual-spacing="false"/>
    </style:style>
    <style:style style:name="P42" style:family="paragraph" style:parent-style-name="Text_20_body" style:list-style-name="L12"/>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3">
      <style:paragraph-properties fo:margin-top="0cm" fo:margin-bottom="0cm" style:contextual-spacing="false"/>
      <style:text-properties officeooo:paragraph-rsid="00214353"/>
    </style:style>
    <style:style style:name="P45" style:family="paragraph" style:parent-style-name="Text_20_body" style:list-style-name="L13"/>
    <style:style style:name="P46" style:family="paragraph" style:parent-style-name="Text_20_body" style:list-style-name="L13">
      <style:text-properties officeooo:rsid="00214353" officeooo:paragraph-rsid="00214353"/>
    </style:style>
    <style:style style:name="P47" style:family="paragraph" style:parent-style-name="Text_20_body" style:list-style-name="L14">
      <style:paragraph-properties fo:margin-top="0cm" fo:margin-bottom="0cm" style:contextual-spacing="false"/>
    </style:style>
    <style:style style:name="P48" style:family="paragraph" style:parent-style-name="Text_20_body" style:list-style-name="L15">
      <style:paragraph-properties fo:margin-top="0cm" fo:margin-bottom="0cm" style:contextual-spacing="false"/>
    </style:style>
    <style:style style:name="P49" style:family="paragraph" style:parent-style-name="Text_20_body" style:list-style-name="L15"/>
    <style:style style:name="P50" style:family="paragraph" style:parent-style-name="Text_20_body">
      <style:paragraph-properties fo:margin-top="0cm" fo:margin-bottom="0cm" style:contextual-spacing="false"/>
    </style:style>
    <style:style style:name="P51" style:family="paragraph" style:parent-style-name="Text_20_body" style:list-style-name="L16">
      <style:paragraph-properties fo:margin-top="0cm" fo:margin-bottom="0cm" style:contextual-spacing="false"/>
    </style:style>
    <style:style style:name="P52" style:family="paragraph" style:parent-style-name="Text_20_body" style:list-style-name="L17">
      <style:paragraph-properties fo:margin-top="0cm" fo:margin-bottom="0cm" style:contextual-spacing="false"/>
      <style:text-properties officeooo:rsid="00234249" officeooo:paragraph-rsid="00234249"/>
    </style:style>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8">
      <style:paragraph-properties fo:margin-top="0cm" fo:margin-bottom="0cm" style:contextual-spacing="false"/>
      <style:text-properties officeooo:rsid="002657fe" officeooo:paragraph-rsid="002657fe"/>
    </style:style>
    <style:style style:name="P55" style:family="paragraph" style:parent-style-name="Text_20_body" style:list-style-name="L18">
      <style:paragraph-properties fo:margin-top="0cm" fo:margin-bottom="0cm" style:contextual-spacing="false"/>
      <style:text-properties officeooo:paragraph-rsid="002c592e"/>
    </style:style>
    <style:style style:name="P56" style:family="paragraph" style:parent-style-name="Text_20_body" style:list-style-name="L18">
      <style:paragraph-properties fo:margin-top="0cm" fo:margin-bottom="0cm" style:contextual-spacing="false"/>
      <style:text-properties officeooo:rsid="002c592e" officeooo:paragraph-rsid="002c592e"/>
    </style:style>
    <style:style style:name="P57" style:family="paragraph" style:parent-style-name="Text_20_body" style:list-style-name="L18"/>
    <style:style style:name="T1" style:family="text">
      <style:text-properties officeooo:rsid="00136977"/>
    </style:style>
    <style:style style:name="T2" style:family="text">
      <style:text-properties officeooo:rsid="0019f5bf"/>
    </style:style>
    <style:style style:name="T3" style:family="text">
      <style:text-properties fo:font-weight="normal" style:font-weight-asian="normal" style:font-weight-complex="normal"/>
    </style:style>
    <style:style style:name="T4" style:family="text">
      <style:text-properties fo:font-weight="normal" officeooo:rsid="0025eb53" style:font-weight-asian="normal" style:font-weight-complex="normal"/>
    </style:style>
    <style:style style:name="T5" style:family="text">
      <style:text-properties officeooo:rsid="002db8b2"/>
    </style:style>
    <style:style style:name="T6" style:family="text">
      <style:text-properties officeooo:rsid="00281697"/>
    </style:style>
    <style:style style:name="T7" style:family="text">
      <style:text-properties officeooo:rsid="0018c886"/>
    </style:style>
    <style:style style:name="T8" style:family="text">
      <style:text-properties officeooo:rsid="002935e6"/>
    </style:style>
    <style:style style:name="T9" style:family="text">
      <style:text-properties fo:font-style="normal" officeooo:rsid="0020be1f" style:font-style-asian="normal" style:font-style-complex="normal"/>
    </style:style>
    <style:style style:name="T10" style:family="text">
      <style:text-properties officeooo:rsid="00299310"/>
    </style:style>
    <style:style style:name="T11" style:family="text">
      <style:text-properties officeooo:rsid="002a06bb"/>
    </style:style>
    <style:style style:name="T12" style:family="text">
      <style:text-properties style:text-underline-style="none" officeooo:rsid="002a06bb"/>
    </style:style>
    <style:style style:name="T13" style:family="text">
      <style:text-properties officeooo:rsid="001c2587"/>
    </style:style>
    <style:style style:name="T14" style:family="text">
      <style:text-properties officeooo:rsid="001f15b5"/>
    </style:style>
    <style:style style:name="T15" style:family="text">
      <style:text-properties officeooo:rsid="001e19c9"/>
    </style:style>
    <style:style style:name="T16" style:family="text">
      <style:text-properties fo:font-weight="bold" officeooo:rsid="001e19c9" style:font-weight-asian="bold" style:font-weight-complex="bold"/>
    </style:style>
    <style:style style:name="T17" style:family="text">
      <style:text-properties fo:font-weight="bold" style:font-weight-asian="bold" style:font-weight-complex="bold"/>
    </style:style>
    <style:style style:name="T18" style:family="text">
      <style:text-properties officeooo:rsid="00202097"/>
    </style:style>
    <style:style style:name="T19" style:family="text">
      <style:text-properties officeooo:rsid="0020ac3c"/>
    </style:style>
    <style:style style:name="T20" style:family="text">
      <style:text-properties officeooo:rsid="002a3cdb"/>
    </style:style>
    <style:style style:name="T21" style:family="text">
      <style:text-properties officeooo:rsid="0026c80a"/>
    </style:style>
    <style:style style:name="T22" style:family="text">
      <style:text-properties officeooo:rsid="002a8b3b"/>
    </style:style>
    <style:style style:name="T23" style:family="text">
      <style:text-properties officeooo:rsid="0023392f"/>
    </style:style>
    <style:style style:name="T24" style:family="text">
      <style:text-properties officeooo:rsid="00234249"/>
    </style:style>
    <style:style style:name="T25" style:family="text">
      <style:text-properties officeooo:rsid="002bc5e7"/>
    </style:style>
    <style:style style:name="T26" style:family="text">
      <style:text-properties officeooo:rsid="0024350c"/>
    </style:style>
    <style:style style:name="T27" style:family="text">
      <style:text-properties officeooo:rsid="0025eb53"/>
    </style:style>
    <style:style style:name="T28" style:family="text">
      <style:text-properties officeooo:rsid="002c592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 ABENTEUER I – Der Splitter der Tiefe</text:span></text:p>
      <text:p text:style-name="Text_20_body"><text:span text:style-name="Strong_20_Emphasis">Stufe:</text:span> 1–3</text:p>
      <text:p text:style-name="Text_20_body"><text:span text:style-name="Strong_20_Emphasis">Ton:</text:span> Düster, nautisch, okkult</text:p>
      <text:p text:style-name="Text_20_body"><text:span text:style-name="Strong_20_Emphasis">Ziel:</text:span> Einen uralten Leviathan-Splitter bergen, der als Schlüssel zum Ritual dient</text:p>
      <text:p text:style-name="Text_20_body">🧭 1. PRÄMISSE</text:p>
      <text:p text:style-name="Text_20_body">Die SC sind Teil der Mannschaft von Kapitän Rauthorn.<text:line-break/>Er hat Hinweise auf einen uralten Splitter gefunden, der in einem versunkenen Tempel auf einer tropischen Insel verborgen liegt.<text:line-break/>Die SC sollen ihn bergen — doch die Insel ist verflucht, und der Splitter hat einen eigenen Willen.</text:p>
      <text:p text:style-name="Text_20_body">🗺️ 2. ABENTEUERSTRUKTUR</text:p>
      <text:list text:style-name="L1">
        <text:list-item>
          <text:p text:style-name="P2"><text:span text:style-name="Strong_20_Emphasis">Ankunft auf der Insel</text:span> </text:p>
        </text:list-item>
        <text:list-item>
          <text:p text:style-name="P2"><text:span text:style-name="Strong_20_Emphasis">Erkundung per Hexcrawl</text:span> </text:p>
        </text:list-item>
        <text:list-item>
          <text:p text:style-name="P2"><text:span text:style-name="Strong_20_Emphasis">Der versunkene Tempel</text:span> </text:p>
        </text:list-item>
        <text:list-item>
          <text:p text:style-name="P2"><text:span text:style-name="Strong_20_Emphasis">Konfrontation mit dem Splitter</text:span> </text:p>
        </text:list-item>
        <text:list-item>
          <text:p text:style-name="P3"><text:span text:style-name="Strong_20_Emphasis">Rückkehr &amp; erste Veränderungen</text:span> </text:p>
        </text:list-item>
      </text:list>
      <text:p text:style-name="Text_20_body">🌴 3. AKT I – ANKUNFT &amp; HEXCRAWL</text:p>
      <text:p text:style-name="Text_20_body"><text:span text:style-name="Strong_20_Emphasis">3.1. Inselzonen (Hexcrawl)</text:span></text:p>
      <text:list text:style-name="L2">
        <text:list-item>
          <text:p text:style-name="P4"><text:span text:style-name="Strong_20_Emphasis">Dschungelpfade</text:span> – mit Fallen, Geistererscheinungen </text:p>
        </text:list-item>
        <text:list-item>
          <text:p text:style-name="P4"><text:span text:style-name="Strong_20_Emphasis"><text:span text:style-name="T1">Behausungen von Eingeborenen und Schrein</text:span></text:span> – Hinweise auf den Tempel </text:p>
        </text:list-item>
        <text:list-item>
          <text:p text:style-name="P4"><text:span text:style-name="Strong_20_Emphasis">Lagune mit Geisterfischen</text:span> – kann heilen oder verfluchen </text:p>
        </text:list-item>
        <text:list-item>
          <text:p text:style-name="P4"><text:span text:style-name="Strong_20_Emphasis">Schädelklippe</text:span> – Zugang zum Tempel </text:p>
        </text:list-item>
        <text:list-item>
          <text:p text:style-name="P5"><text:span text:style-name="Strong_20_Emphasis">Verfallenes Piratenlager</text:span> – mit Karte und Splitterwarnung </text:p>
        </text:list-item>
      </text:list>
      <text:p text:style-name="Text_20_body"><text:span text:style-name="Strong_20_Emphasis">3.2. Zufallsbegegnungen (1W6)</text:span></text:p>
      <table:table table:name="Tabelle1" table:style-name="Tabelle1">
        <table:table-column table:style-name="Tabelle1.A"/>
        <table:table-column table:style-name="Tabelle1.B"/>
        <table:table-row>
          <table:table-cell table:style-name="Tabelle1.A1" office:value-type="string">
            <text:p text:style-name="P6">W6</text:p>
          </table:table-cell>
          <table:table-cell table:style-name="Tabelle1.B1" office:value-type="string">
            <text:p text:style-name="P6">Begenungen</text:p>
          </table:table-cell>
        </table:table-row>
        <table:table-row>
          <table:table-cell table:style-name="Tabelle1.A2" office:value-type="string">
            <text:p text:style-name="P6">1</text:p>
          </table:table-cell>
          <table:table-cell table:style-name="Tabelle1.B2" office:value-type="string">
            <text:p text:style-name="Table_20_Contents">Geisterpiraten, d<text:span text:style-name="T2">ie keine Ruhe finden</text:span></text:p>
          </table:table-cell>
        </table:table-row>
        <table:table-row>
          <table:table-cell table:style-name="Tabelle1.A2" office:value-type="string">
            <text:p text:style-name="P6">2</text:p>
          </table:table-cell>
          <table:table-cell table:style-name="Tabelle1.B2" office:value-type="string">
            <text:p text:style-name="P7">Eine riesige Schlange die Sich durch die Bäume schlängelt</text:p>
          </table:table-cell>
        </table:table-row>
        <table:table-row>
          <table:table-cell table:style-name="Tabelle1.A2" office:value-type="string">
            <text:p text:style-name="P6">3</text:p>
          </table:table-cell>
          <table:table-cell table:style-name="Tabelle1.B2" office:value-type="string">
            <text:p text:style-name="P8">Eine Gruppe überlebender Eingeborener</text:p>
          </table:table-cell>
        </table:table-row>
        <table:table-row>
          <table:table-cell table:style-name="Tabelle1.A2" office:value-type="string">
            <text:p text:style-name="P6">4</text:p>
          </table:table-cell>
          <table:table-cell table:style-name="Tabelle1.B2" office:value-type="string">
            <text:p text:style-name="P7">Riesige Steinkrabben die sich als Felsbrocken tarnen</text:p>
          </table:table-cell>
        </table:table-row>
        <table:table-row>
          <table:table-cell table:style-name="Tabelle1.A2" office:value-type="string">
            <text:p text:style-name="P6">5</text:p>
          </table:table-cell>
          <table:table-cell table:style-name="Tabelle1.B2" office:value-type="string">
            <text:p text:style-name="P9">Ein verfluchter Affenschwarm</text:p>
          </table:table-cell>
        </table:table-row>
        <table:table-row>
          <table:table-cell table:style-name="Tabelle1.A2" office:value-type="string">
            <text:p text:style-name="P6">6</text:p>
          </table:table-cell>
          <table:table-cell table:style-name="Tabelle1.B2" office:value-type="string">
            <text:p text:style-name="Table_20_Contents">Ein Riss im Boden, der Stimmen aus der Tiefe freisetzt</text:p>
          </table:table-cell>
        </table:table-row>
      </table:table>
      <text:p text:style-name="Text_20_body"/>
      <text:p text:style-name="P10">Der verfluchte Affenschwarm greift die Spieler spätestens vor dem Eingang in den Tempel der Tiefe an!</text:p>
      <text:p text:style-name="Text_20_body">🏛️ 4. AKT II – DER TEMPEL DER TIEFE</text:p>
      <text:p text:style-name="Text_20_body"><text:span text:style-name="Strong_20_Emphasis">4.1. Aufbau (Dungeon, 5 Räume)</text:span></text:p>
      <text:list text:style-name="L3">
        <text:list-item>
          <text:p text:style-name="P11"><text:span text:style-name="Strong_20_Emphasis"><text:span text:style-name="T3">Raum 1 – Der Schlund des Tempels</text:span></text:span></text:p>
        </text:list-item>
        <text:list-item>
          <text:p text:style-name="P11"><text:soft-page-break/><text:span text:style-name="Strong_20_Emphasis"><text:span text:style-name="T3">Raum 2 – Die Hallen der Flüsternden Wellen</text:span></text:span></text:p>
        </text:list-item>
        <text:list-item>
          <text:p text:style-name="P11"><text:span text:style-name="Strong_20_Emphasis"><text:span text:style-name="T3">Raum 3 – Die Ertrunkenen Stufen</text:span></text:span></text:p>
        </text:list-item>
        <text:list-item>
          <text:p text:style-name="P11"><text:span text:style-name="Strong_20_Emphasis"><text:span text:style-name="T3">Raum 4 – Die Galerie der Ertrunkenen</text:span></text:span></text:p>
        </text:list-item>
        <text:list-item>
          <text:p text:style-name="P11"><text:span text:style-name="Strong_20_Emphasis"><text:span text:style-name="T3">Raum 5 – Der Korridor der Klagenden</text:span></text:span></text:p>
        </text:list-item>
        <text:list-item>
          <text:p text:style-name="P11"><text:span text:style-name="Strong_20_Emphasis"><text:span text:style-name="T3">Raum 6 – Die Kammer der Zersplitterten Wahrheit</text:span></text:span></text:p>
        </text:list-item>
        <text:list-item>
          <text:p text:style-name="P11"><text:span text:style-name="Strong_20_Emphasis"><text:span text:style-name="T3">Raum </text:span></text:span><text:span text:style-name="Strong_20_Emphasis"><text:span text:style-name="T4">7</text:span></text:span><text:span text:style-name="Strong_20_Emphasis"><text:span text:style-name="T3"> – Die Kammer des Splitters</text:span></text:span></text:p>
        </text:list-item>
      </text:list>
      <text:p text:style-name="Text_20_body">⚔️ <text:span text:style-name="T5">5</text:span>. FINALE OPTIONEN</text:p>
      <text:p text:style-name="Text_20_body"><text:span text:style-name="Strong_20_Emphasis">Wenn die SC den Splitter bergen:</text:span></text:p>
      <text:list text:style-name="L4">
        <text:list-item>
          <text:p text:style-name="P12">Der Kapitän wird euphorisch </text:p>
        </text:list-item>
        <text:list-item>
          <text:p text:style-name="P12">Die SC spüren erste Veränderungen (Träume, Stimmen) </text:p>
        </text:list-item>
        <text:list-item>
          <text:p text:style-name="P13">Die Schwarze See beginnt zu reagieren </text:p>
        </text:list-item>
      </text:list>
      <text:p text:style-name="Text_20_body"><text:span text:style-name="Strong_20_Emphasis">Wenn sie ihn zerstören:</text:span></text:p>
      <text:list text:style-name="L5">
        <text:list-item>
          <text:p text:style-name="P14">Der Leviathan erwacht</text:p>
        </text:list-item>
        <text:list-item>
          <text:p text:style-name="P15">Der Kapitän wird wütend <text:span text:style-name="T5">und wendet sich gegen die Spieler</text:span></text:p>
        </text:list-item>
        <text:list-item>
          <text:p text:style-name="P16">Die SC <text:span text:style-name="T5">werden vom erwachten Leviathan belohnt</text:span></text:p>
        </text:list-item>
        <text:list-item>
          <text:p text:style-name="P17">Die Welt verändert sich drastisch</text:p>
        </text:list-item>
      </text:list>
      <text:p text:style-name="P1"><text:span text:style-name="Emphasis"/></text:p>
      <text:p text:style-name="P18"><text:span text:style-name="Emphasis"><text:span text:style-name="T1">Piratenlager</text:span></text:span></text:p>
      <text:p text:style-name="P18"><text:span text:style-name="Emphasis"><text:s/></text:span><text:span text:style-name="Emphasis"><text:span text:style-name="Strong_20_Emphasis">Vorlesetext: Das Piratenlager</text:span></text:span></text:p>
      <text:p text:style-name="Text_20_body"><text:span text:style-name="Emphasis">Der Dschungel öffnet sich plötzlich, als hättet ihr eine unsichtbare Schwelle überschritten. Vor euch liegt eine kleine Lichtung, auf der ein verlassenes Piratenlager steht — halb überwuchert, halb vom Wind zerzaust, aber eindeutig nicht alt genug, um vergessen zu sein.</text:span></text:p>
      <text:p text:style-name="Text_20_body"><text:span text:style-name="Emphasis">Ein paar schief stehende Holzhütten ducken sich unter den Palmen, ihre Dächer aus Palmblättern sind eingerissen und hängen wie nasse Fetzen herab. Ein Feuerplatz liegt in der Mitte der Lichtung, gefüllt mit kalter, grauer Asche. Daneben stehen umgestürzte Fässer, einige aufgebrochen, andere noch versiegelt, als hätte jemand sie in Eile zurückgelassen.</text:span></text:p>
      <text:p text:style-name="Text_20_body"><text:span text:style-name="Emphasis">Überall liegen Spuren eines hastigen Aufbruchs: ein zerbrochenes Entermesser, ein zerrissenes Hemd, Fußabdrücke, die im feuchten Boden verschwimmen. Eine Hängematte schwingt leicht im Wind.</text:span></text:p>
      <text:p text:style-name="P18"><text:span text:style-name="Emphasis"><text:span text:style-name="T1">Gegenstände:</text:span></text:span></text:p>
      <text:p text:style-name="P18"><text:span text:style-name="Emphasis"><text:span text:style-name="T1">1. Mehrere Fackeln</text:span></text:span></text:p>
      <text:p text:style-name="P18"><text:span text:style-name="Emphasis"><text:span text:style-name="T1">2. Einige brauchbare Waffen wie Säbel, Messer…</text:span></text:span></text:p>
      <text:p text:style-name="P18"><text:span text:style-name="Emphasis"><text:span text:style-name="T1">3. </text:span></text:span><text:span text:style-name="Emphasis"><text:span text:style-name="T6">Ein toter Pirat hält das</text:span></text:span><text:span text:style-name="Emphasis"><text:span text:style-name="T1"> Logbuch des Piraten Kapitäns mit Hinweisen auf einen Schrein der zu einem Schädeltempel führen soll </text:span></text:span><text:span text:style-name="Emphasis"><text:span text:style-name="T6">in seinen Händen</text:span></text:span><text:span text:style-name="Emphasis"><text:span text:style-name="T1">.</text:span></text:span></text:p>
      <text:p text:style-name="P1"><text:span text:style-name="Emphasis"/></text:p>
      <text:p text:style-name="P19"><text:soft-page-break/><text:span text:style-name="Emphasis"><text:span text:style-name="T7">Stammesdorf</text:span></text:span></text:p>
      <text:p text:style-name="P1"><text:span text:style-name="Emphasis">🪶 </text:span><text:span text:style-name="Emphasis"><text:span text:style-name="Strong_20_Emphasis">Vorlesetext: Das verlassene Stammesdorf und der Schrein</text:span></text:span></text:p>
      <text:p text:style-name="Text_20_body"><text:span text:style-name="Emphasis">Der Dschungel lichtet sich, und ihr tretet in ein kleines Dorf, das stiller ist als ein Grab. Die Hütten aus geflochtenem Bambus und Palmblättern stehen in einem Halbkreis, viele davon eingestürzt, andere schwarz verbrannt. Überall liegen zerbrochene Tongefäße, verstreute Werkzeuge und Spuren eines Lebens, das abrupt und gewaltsam endete.</text:span></text:p>
      <text:p text:style-name="Text_20_body"><text:span text:style-name="Emphasis">Der Wind trägt den Geruch von feuchter Erde und etwas Metallischem — Blut, längst getrocknet, aber noch immer spürbar. Keine Stimmen, keine Tiere, nicht einmal Insekten wagen sich in diese Stille. Es ist, als hielte der Dschungel den Atem an.</text:span></text:p>
      <text:p text:style-name="Text_20_body"><text:span text:style-name="Emphasis">Im Zentrum des Dorfes erhebt sich ein Schrein aus Stein. Er ist mit geschnitzten Symbolen bedeckt: Spiralen, Wellen, Augen, die euch zu folgen scheinen. Vor dem Schrein liegt ein Opferplatz aus flachen Steinen, dunkel verfärbt. Die Luft um ihn herum wirkt schwerer, dichter — als würde etwas Unsichtbares über dem Ort wachen.</text:span></text:p>
      <text:p text:style-name="Text_20_body"><text:span text:style-name="Emphasis">Zwischen den Hütten erkennt ihr Spuren eines Kampfes: eingerissene Wände, Blutspuren im Sand, ein Speer, der in einem Baumstamm steckt. Doch keine Körper. Nur Leere</text:span></text:p>
      <text:p text:style-name="Text_20_body"><text:span text:style-name="Emphasis">Der Schrein selbst scheint unversehrt.</text:span></text:p>
      <text:p text:style-name="Text_20_body"><text:span text:style-name="Emphasis"/></text:p>
      <text:p text:style-name="P1"><text:span text:style-name="Emphasis"/></text:p>
      <text:p text:style-name="P1"><text:span text:style-name="Emphasis">🪨 </text:span><text:span text:style-name="Emphasis"><text:span text:style-name="Strong_20_Emphasis">Vorlesetext: Der Schrein der Stillen Tiefe</text:span></text:span></text:p>
      <text:p text:style-name="Text_20_body"><text:span text:style-name="Emphasis">Der Schrein wirkt auf den ersten Blick schlicht, fast unscheinbar. Ein niedriger Block aus hellem Stein, von Moos überwachsen. Doch als ihr näher tretet, erkennt ihr die feinen Gravuren, die seine Oberfläche bedecken — eingeritzte Linien, die im Licht des Dschungels wie fließendes Wasser schimmern.</text:span></text:p>
      <text:p text:style-name="Text_20_body"><text:span text:style-name="Emphasis">Die Darstellungen sind einfach, aber klar: Eine runde Lagune, eingerahmt von Palmen. Daneben ein einzelner Kreis — eine Perle, größer dargestellt, als sie in Wirklichkeit sein könnte. Und schließlich ein länglicher, gezackter Stein </text:span><text:span text:style-name="Emphasis"><text:span text:style-name="T8">oder ein Splitter</text:span></text:span><text:span text:style-name="Emphasis">.</text:span></text:p>
      <text:p text:style-name="Text_20_body"><text:span text:style-name="Emphasis"><text:span text:style-name="T8">Weitere</text:span></text:span><text:span text:style-name="Emphasis"> Bilder zeigen eine Abfolge: Zuerst ruht der Splitter in einer steinernen Schale. Dann wird er herausgehoben — doch in der nächsten Darstellung bricht die Schale auseinander, als würde sie den Verlust nicht ertragen. In der letzten Szene liegt die Perle an seiner Stelle, und die Schale bleibt unversehrt.</text:span></text:p>
      <text:p text:style-name="Text_20_body"><text:span text:style-name="Emphasis">Unter den Bildern verläuft eine einzige, geschwungene Linie, die wie eine Welle gezeichnet ist. Sie endet in einem kleinen Symbol, das an ein Auge erinnert — wachsam, warnend.</text:span></text:p>
      <text:p text:style-name="P20"><text:span text:style-name="Emphasis"><text:span text:style-name="T9">Wenn der Schrein genauer untersucht wird findet man an der Vorderseite folgende Symbole und Inschriften unter Moos verborgen. Diese geben Hinweise darauf wie die Spieler die Türe zum Tempel öffnen können:</text:span></text:span></text:p>
      <text:p text:style-name="P20"><text:span text:style-name="Strong_20_Emphasis">Relief 1 – Geburt im Meer</text:span></text:p>
      <text:p text:style-name="P20">Ein gewaltiger Schatten steigt aus einer Welle empor.<text:line-break/>Darunter:<text:line-break/><text:span text:style-name="Emphasis">„Aus d</text:span><text:span text:style-name="Emphasis"><text:span text:style-name="T10">er Dunkelheit </text:span></text:span><text:span text:style-name="Emphasis"><text:s/>nahm er Form.“</text:span></text:p>
      <text:p text:style-name="P20"><text:soft-page-break/><text:span text:style-name="Strong_20_Emphasis">Relief 2 – Die Fesselung</text:span></text:p>
      <text:p text:style-name="P20">Menschen schlagen Ketten um ein riesiges, schemenhaftes Wesen.<text:line-break/>Darunter:<text:line-break/><text:span text:style-name="Emphasis">„</text:span><text:span text:style-name="Emphasis"><text:span text:style-name="T10">Mit vereinten Kräften </text:span></text:span><text:span text:style-name="Emphasis"><text:span text:style-name="T11">gekettet an die Erde</text:span></text:span><text:span text:style-name="Emphasis">.“</text:span></text:p>
      <text:p text:style-name="P20"><text:span text:style-name="Strong_20_Emphasis">Relief 3 – Die Warnung</text:span></text:p>
      <text:p text:style-name="P20">Ein Schädel, aus dem Licht aufsteigt — doch eine Hand drückt ihn zurück in die Tiefe.<text:line-break/>Darunter:<text:line-break/><text:span text:style-name="Emphasis">„</text:span><text:span text:style-name="Emphasis"><text:span text:style-name="T10">Niemals darf er</text:span></text:span><text:span text:style-name="Emphasis"> </text:span><text:span text:style-name="Emphasis"><text:span text:style-name="T12">auferstehen</text:span></text:span><text:span text:style-name="Emphasis">.“</text:span></text:p>
      <text:p text:style-name="P20"><text:span text:style-name="Emphasis">Diese drei Reliefs geben den Spielern die Lösung, ohne sie direkt auszusprechen.</text:span></text:p>
      <text:p text:style-name="P1"><text:span text:style-name="Emphasis"/></text:p>
      <text:p text:style-name="P19"><text:span text:style-name="Emphasis"><text:span text:style-name="T7">Lagune</text:span></text:span></text:p>
      <text:p text:style-name="P1"><text:span text:style-name="Emphasis">🌊 </text:span><text:span text:style-name="Emphasis"><text:span text:style-name="Strong_20_Emphasis">Vorlesetext: Die Lagune der Stillen Geister</text:span></text:span></text:p>
      <text:p text:style-name="Text_20_body"><text:span text:style-name="Emphasis">Der Dschungel öffnet sich zu einer weiten, halbmondförmigen Lagune, deren Wasser so klar ist, dass ihr den sandigen Grund erkennen könnt. Die Oberfläche liegt vollkommen ruhig da, als wäre sie aus Glas gegossen. Kein Wind kräuselt sie, kein Laut stört die Stille — nur das leise Tropfen von Wasser, das von den Felsen am Rand herabrinnt.</text:span></text:p>
      <text:p text:style-name="Text_20_body"><text:span text:style-name="Emphasis">Unter der Oberfläche gleiten silbrige Schatten dahin. Fische — doch nicht wie ihr sie kennt. Ihre Körper wirken durchsichtig, als bestünden sie aus Licht und Nebel zugleich. Sie ziehen lautlose Bahnen, und jedes Mal, wenn einer von ihnen die Richtung ändert, huscht ein schwacher Schimmer durch das Wasser, wie ein Echo ihrer Bewegung.</text:span></text:p>
      <text:p text:style-name="Text_20_body"><text:span text:style-name="Emphasis">Als ihr genauer hinseht, bemerkt ihr etwas Seltsames: An mehreren Stellen am Grund der Lagune glimmt ein sanftes, bläuliches Licht. Nicht hell genug, um die Umgebung zu erleuchten, aber deutlich genug, um zu verraten, dass dort unten etwas liegt. Das Schimmern pulsiert langsam, wie ein Herzschlag, und verschwindet immer wieder unter einer dünnen Schicht aus Sand und Muscheln.</text:span></text:p>
      <text:p text:style-name="Text_20_body"><text:span text:style-name="Emphasis">Die Geisterfische meiden diese Stellen — sie ziehen weite Kreise darum, als wüssten sie mehr über das, was dort verborgen ruht, als jeder Mensch es könnte.</text:span></text:p>
      <text:p text:style-name="P19"><text:span text:style-name="Emphasis"><text:span text:style-name="T7">Hinweis: </text:span></text:span></text:p>
      <text:p text:style-name="P19"><text:span text:style-name="Emphasis"><text:span text:style-name="T7">Die Perlen am Grund können geborgen werden. Allerdings ist die Lagune sehr tief. DC 15 auf KON nötig um eine Perle zu bergen. Wenn ein Spieler eine Perle an sich nimmt wird er von unsichtbaren Händen zum Grund der Lagune gezogen. DC 11 auf ST <text:s/>um auftauchen zu können.</text:span></text:span></text:p>
      <text:p text:style-name="Text_20_body"><text:span text:style-name="Emphasis"/></text:p>
      <text:p text:style-name="Text_20_body"><text:span text:style-name="Emphasis">💀 </text:span><text:span text:style-name="Emphasis"><text:span text:style-name="Strong_20_Emphasis">Vorlesetext: Der Schädeltempel</text:span></text:span></text:p>
      <text:p text:style-name="Text_20_body"><text:span text:style-name="Emphasis">Der Dschungel fällt zurück, und vor euch öffnet sich eine breite Senke aus grauem Fels. In ihrer Mitte erhebt sich ein massiver Steinblock, von Wind und Wasser so geformt, dass er die Silhouette eines Schädels trägt — nicht perfekt, nicht kunstvoll, aber unheimlich natürlich. Die Augenhöhlen sind tief eingesunken, gefüllt mit Schatten, die selbst das Sonnenlicht nicht zu durchdringen scheint.</text:span></text:p>
      <text:p text:style-name="Text_20_body"><text:soft-page-break/><text:span text:style-name="Emphasis">Der Eingang liegt dort, wo der „Mund“ des Schädels sein müsste: ein dunkler Spalt, aus dem kühle, feuchte Luft strömt. Sie riecht nach altem Wasser, nach Salz und nach etwas, das an vergessene Tiefen erinnert. Ein leises Tropfen hallt aus dem Inneren, regelmäßig wie ein </text:span><text:span text:style-name="Emphasis"><text:span text:style-name="T11">H</text:span></text:span><text:span text:style-name="Emphasis">erzschlag.</text:span></text:p>
      <text:p text:style-name="Text_20_body"><text:span text:style-name="Emphasis">Die Felsen um den Eingang herum sind mit eingeritzten Symbolen bedeckt — Wellen, Spiralen, und ein einzelnes Zeichen, das wie ein Kreis mit einem Punkt in der Mitte aussieht. Manche Linien sind frisch, andere fast verwittert, als hätten viele Hände über viele Generationen hinweg dieselben Muster nachgezogen. </text:span></text:p>
      <text:p text:style-name="Text_20_body"><text:span text:style-name="Emphasis">Als ihr näher tretet, verändert sich die Luft. Sie wird schwerer, dichter, als würde der Tempel eure Anwesenheit bemerken. Ein schwaches, bläuliches Leuchten pulsiert tief im Inneren, kaum sichtbar, aber eindeutig — ein Licht, das nicht von Fackeln stammt, sondern von etwas, das dort unten wartet.</text:span></text:p>
      <text:p text:style-name="Text_20_body"><text:span text:style-name="Strong_20_Emphasis"/></text:p>
      <text:p text:style-name="Text_20_body"><text:span text:style-name="Strong_20_Emphasis"/></text:p>
      <text:p text:style-name="P1"><text:span text:style-name="Emphasis">💀🌊 </text:span><text:span text:style-name="Emphasis"><text:span text:style-name="Strong_20_Emphasis">Der Tempel der Tiefe - </text:span></text:span><text:span text:style-name="Emphasis"><text:span text:style-name="Strong_20_Emphasis"><text:span text:style-name="T13">Crawl</text:span></text:span></text:span></text:p>
      <text:p text:style-name="Text_20_body"><text:span text:style-name="Strong_20_Emphasis">Allgemeine Stimmung</text:span></text:p>
      <text:p text:style-name="Text_20_body">Der Tempel ist feucht, kalt und wirkt wie ein lebendiger Organismus.<text:line-break/>Überall tropft Wasser, die Wände pulsieren leicht, und ein bläuliches Leuchten zieht sich wie Adern durch den Stein.</text:p>
      <text:p text:style-name="P1"><text:span text:style-name="Strong_20_Emphasis">Raum 1 – Der Schlund des Tempels</text:span></text:p>
      <text:p text:style-name="Text_20_body"><text:span text:style-name="Emphasis">Eingangshalle</text:span></text:p>
      <text:list text:style-name="L6">
        <text:list-item>
          <text:p text:style-name="P21">Ein niedriger, klaffender Gang, der wie ein Rachen wirkt. </text:p>
        </text:list-item>
        <text:list-item>
          <text:p text:style-name="P21">Kalter Wind strömt heraus, begleitet von einem tiefen, kaum hörbaren Dröhnen. </text:p>
        </text:list-item>
        <text:list-item>
          <text:p text:style-name="P21"><text:span text:style-name="Strong_20_Emphasis">Gefahr:</text:span> Rutschiger Boden → DEX‑Save DC 1<text:span text:style-name="T14">1</text:span>, sonst Sturz <text:span text:style-name="T13">und W4 Schaden</text:span>. </text:p>
        </text:list-item>
        <text:list-item>
          <text:p text:style-name="P22"><text:span text:style-name="Strong_20_Emphasis">Hinweis:</text:span> Kratzspuren an den Wänden → „Etwas wurde hier hineingezogen.“ </text:p>
        </text:list-item>
      </text:list>
      <text:p text:style-name="P1"><text:span text:style-name="Emphasis">💀 </text:span><text:span text:style-name="Emphasis"><text:span text:style-name="Strong_20_Emphasis">Vorlesetext – Raum 1: Der Schlund des Tempels</text:span></text:span></text:p>
      <text:p text:style-name="Text_20_body"><text:span text:style-name="Emphasis">Der Eingang des Tempels liegt vor euch wie ein aufgerissener Rachen. Der Gang dahinter ist niedrig, klaffend, und die Felswände scheinen sich unnatürlich nach innen zu wölben, als wollten sie euch verschlingen. Ein kalter Wind strömt aus der Dunkelheit, viel zu kalt für das feuchte Klima der Insel, und trägt ein tiefes, kaum hörbares Dröhnen mit sich — ein Laut, der eher gefühlt als gehört wird.</text:span></text:p>
      <text:p text:style-name="Text_20_body"><text:span text:style-name="Emphasis">Der Boden glänzt feucht, als hätte das Gestein selbst geschwitzt. Jeder Schritt lässt das Wasser leise schmatzen, und die Felsen unter euren Füßen wirken tückisch glatt. An den Wänden ziehen sich lange, unregelmäßige Kratzspuren entlang, tief in den Stein gerissen. Sie verlaufen alle in dieselbe Richtung — hinein in die Dunkelheit.</text:span></text:p>
      <text:p text:style-name="P1"><text:span text:style-name="Emphasis"/></text:p>
      <text:p text:style-name="P1"><text:span text:style-name="Strong_20_Emphasis">Raum 2 – Die Hallen der Flüsternden Wellen</text:span></text:p>
      <text:p text:style-name="Text_20_body"><text:span text:style-name="Emphasis">Echo-Kammer</text:span></text:p>
      <text:list text:style-name="L7">
        <text:list-item>
          <text:p text:style-name="P23"><text:soft-page-break/>Tropfsteine formen natürliche Säulen. </text:p>
        </text:list-item>
        <text:list-item>
          <text:p text:style-name="P23">Flüstern hallt durch den Raum, obwohl niemand spricht. </text:p>
        </text:list-item>
        <text:list-item>
          <text:p text:style-name="P23"><text:span text:style-name="Strong_20_Emphasis">Encounter:</text:span> <text:span text:style-name="T15">W4+2</text:span> <text:span text:style-name="Strong_20_Emphasis">Geisterpiraten</text:span>, die die SC warnen, <text:span text:style-name="T13">die Geisterpiraten sind verwirrt. Je länger sie sich in dem Raum aufhalten desto größer die Chance angriffen zu werden. W4+Runden im Raum. Bei einer 4+ greifen die Piraten an.</text:span> </text:p>
        </text:list-item>
        <text:list-item>
          <text:p text:style-name="P24"><text:span text:style-name="Strong_20_Emphasis">Hinweis:</text:span> Einer murmelt „Der Kapitän… er hat uns verraten…“ </text:p>
        </text:list-item>
      </text:list>
      <text:p text:style-name="P1"><text:span text:style-name="Emphasis"/></text:p>
      <text:p text:style-name="P1"><text:span text:style-name="Emphasis">🌊 </text:span><text:span text:style-name="Emphasis"><text:span text:style-name="Strong_20_Emphasis">Vorlesetext – Raum 2: Die Hallen der Flüsternden Wellen</text:span></text:span></text:p>
      <text:p text:style-name="Text_20_body"><text:span text:style-name="Emphasis">Der Gang öffnet sich zu einer weiten Kammer, deren Wände von Tropfsteinen überzogen sind. Manche der herabhängenden Formationen reichen bis zum Boden und bilden natürliche Säulen, zwischen denen das Licht eurer Fackeln flackert. Jeder Tropfen, der von der Decke fällt, hallt viel zu laut nach — als würde der Raum jedes Geräusch gierig verschlucken und dann verzerrt zurückgeben.</text:span></text:p>
      <text:p text:style-name="Text_20_body"><text:span text:style-name="Emphasis">Doch dann hört ihr etwas anderes. Ein Flüstern. Erst leise, kaum mehr als ein Hauch, dann deutlicher — Stimmen, die sich in den Schatten verlieren. Niemand von euch spricht, und doch scheint der Raum voller Worte zu sein. Manche klingen wie Warnungen, andere wie Klagen, manche wie das Wispern von Ertrinkenden.</text:span></text:p>
      <text:p text:style-name="P25"><text:span text:style-name="Emphasis"><text:span text:style-name="T16">Wenn die Spieler weiter in die Hallen eintreten:</text:span></text:span></text:p>
      <text:p text:style-name="Text_20_body"><text:span text:style-name="Emphasis">Zwischen den Säulen beginnen Gestalten aufzutauchen: durchscheinende Körper in zerfetzten Piraten</text:span><text:span text:style-name="Emphasis"><text:span text:style-name="T11">kleidung</text:span></text:span><text:span text:style-name="Emphasis">, ihre Gesichter verzerrt vor Schmerz und Verwirrung. Sie wirken, als würden sie gleichzeitig auf euch zukommen und vor euch zurückweichen, gefangen zwischen Erinnerung und Fluch.</text:span></text:p>
      <text:p text:style-name="Text_20_body"><text:span text:style-name="Emphasis">Einer der Geister hebt den Kopf, als würde er euch erkennen. Seine Stimme ist kaum mehr als ein Windstoß, doch die Worte schneiden klar durch die Stille:</text:span></text:p>
      <text:p text:style-name="Text_20_body"><text:span text:style-name="Emphasis">„Der Kapitän… er hat uns verraten… </text:span><text:span text:style-name="Emphasis"><text:span text:style-name="T11">hat uns im stich gelassen</text:span></text:span><text:span text:style-name="Emphasis">“</text:span></text:p>
      <text:p text:style-name="Text_20_body"><text:span text:style-name="Emphasis">Die anderen beginnen unruhig zu flackern, ihre Formen verzerren sich, als würde etwas in ihnen erwachen.</text:span></text:p>
      <text:p text:style-name="P1"><text:span text:style-name="Emphasis"/></text:p>
      <text:p text:style-name="P1"><text:span text:style-name="Strong_20_Emphasis">Raum 3 – Die Ertrunkenen Stufen</text:span></text:p>
      <text:p text:style-name="Text_20_body"><text:span text:style-name="Emphasis">Geflutete Treppe</text:span></text:p>
      <text:list text:style-name="L8">
        <text:list-item>
          <text:p text:style-name="P26">Eine breite Treppe führt hinab <text:span text:style-name="T14">in einen Länglichen Raum geflutet mit</text:span> <text:span text:style-name="T14">hüfttiefem</text:span> Wasser. </text:p>
        </text:list-item>
        <text:list-item>
          <text:p text:style-name="P27">Steinsäulen ragen leicht aus dem Wasser und bieten einen Weg durch den Raum</text:p>
        </text:list-item>
        <text:list-item>
          <text:p text:style-name="P26">Unter der <text:span text:style-name="T14">Wassero</text:span>berfläche bewegen sich Schatten. </text:p>
        </text:list-item>
        <text:list-item>
          <text:p text:style-name="P28"><text:span text:style-name="Strong_20_Emphasis">Gefahr:</text:span> Rutschige <text:span text:style-name="T14">Säulen</text:span> → DEX‑Save DC 1<text:span text:style-name="T14">1</text:span>, sonst Sturz <text:span text:style-name="T14">ins Wasser</text:span>. </text:p>
        </text:list-item>
        <text:list-item>
          <text:p text:style-name="P26"><text:span text:style-name="Strong_20_Emphasis">Gefahr:</text:span> <text:span text:style-name="T14">Wer ins Wasser fällt wird von </text:span><text:span text:style-name="Strong_20_Emphasis">Geisterfische</text:span><text:span text:style-name="Strong_20_Emphasis"><text:span text:style-name="T14">n</text:span></text:span> <text:span text:style-name="T14">angegriffen und erhält W4 Schaden</text:span></text:p>
        </text:list-item>
        <text:list-item>
          <text:p text:style-name="P27"><text:span text:style-name="T17">Gefahr</text:span>: Es ist außerordentlich schwer wieder aus dem Wasser zu steigen, <text:span text:style-name="T18">da unsichtbare Hände an den Spielern ziehen</text:span>. DC 11 DEX + DC 15 ST</text:p>
        </text:list-item>
      </text:list>
      <text:p text:style-name="P1"><text:span text:style-name="Emphasis"/></text:p>
      <text:p text:style-name="P1"><text:span text:style-name="Emphasis">🌊 </text:span><text:span text:style-name="Emphasis"><text:span text:style-name="Strong_20_Emphasis">Vorlesetext – Raum 3: Die Ertrunkenen Stufen</text:span></text:span></text:p>
      <text:p text:style-name="Text_20_body"><text:soft-page-break/><text:span text:style-name="Emphasis">Die Treppe vor euch ist breit, aber ihre Stufen verschwinden rasch unter dunklem Wasser. Der Raum dahinter ist langgezogen wie ein unterirdischer Kanal, geflutet bis zur Hüfte. Das Wasser ist kalt, überraschend klar — und doch wirkt es, als würde es jeden Schritt verschlucken.</text:span></text:p>
      <text:p text:style-name="Text_20_body"><text:span text:style-name="Emphasis">Mehrere Steinsäulen ragen aus der Oberfläche, glatt und feucht, gerade hoch genug, um einen Weg über das Wasser zu bieten. Ihr schimmernder Belag lässt sie tückisch wirken, als hätten sie schon viele in die Tiefe gleiten lassen.</text:span></text:p>
      <text:p text:style-name="Text_20_body"><text:span text:style-name="Emphasis">Unter der Wasseroberfläche ziehen sich Schatten entlang, lautlos und schnell. Immer wieder huscht etwas zwischen den Säulen hindurch, zu schnell, um es genau zu erkennen — nur ein silbriges Aufblitzen, ein kurzes Flirren, als würde Licht selbst eine Form annehmen.</text:span></text:p>
      <text:p text:style-name="Text_20_body"><text:span text:style-name="Emphasis">Das Wasser bleibt still. Zu still. Doch ihr habt das Gefühl, dass etwas dort unten wartet… und dass es jede Bewegung beobachtet.</text:span></text:p>
      <text:p text:style-name="P1"><text:span text:style-name="Emphasis"/></text:p>
      <text:p text:style-name="P1"><text:span text:style-name="Emphasis">💀 </text:span><text:span text:style-name="Emphasis"><text:span text:style-name="Strong_20_Emphasis">Raum 4 – Die Galerie der Ertrunkenen</text:span></text:span></text:p>
      <text:p text:style-name="P29"><text:span text:style-name="Strong_20_Emphasis"><text:span text:style-name="T19">Eingang zum Tempel:</text:span></text:span></text:p>
      <text:list text:continue-numbering="true" text:style-name="L8">
        <text:list-item>
          <text:p text:style-name="P30"><text:span text:style-name="Strong_20_Emphasis"><text:span text:style-name="T3">ein großer Raum mit einer hohen Decke</text:span></text:span></text:p>
        </text:list-item>
        <text:list-item>
          <text:p text:style-name="P30"><text:span text:style-name="Strong_20_Emphasis"><text:span text:style-name="T3">der Raum endet an einer Größen verschlossenen Steintüre </text:span></text:span></text:p>
        </text:list-item>
        <text:list-item>
          <text:p text:style-name="P30"><text:span text:style-name="Strong_20_Emphasis"><text:span text:style-name="T3">um die Tür zu öffnen müssen die Spieler ein Rästel lösen.</text:span></text:span></text:p>
        </text:list-item>
        <text:list-item>
          <text:p text:style-name="P30"><text:span text:style-name="Strong_20_Emphasis"><text:span text:style-name="T3">Scheitern die Spieler an dem Rästel fahren die Geister der Piraten in die Toten und greifen die an </text:span></text:span></text:p>
        </text:list-item>
      </text:list>
      <text:p text:style-name="P31"><text:span text:style-name="Strong_20_Emphasis"/></text:p>
      <text:p text:style-name="P29">🌑 <text:span text:style-name="Strong_20_Emphasis">Vorlesetext - Raum 4: Die Galerie der Ertrunkenen</text:span></text:p>
      <text:p text:style-name="Text_20_body"><text:span text:style-name="Emphasis">Der Gang öffnet sich zu einem gewaltigen Raum, dessen Decke so hoch ist, dass eure Fackeln sie kaum erreichen. Feuchte Tropfen fallen aus der Dunkelheit herab und hallen wie einzelne Herzschläge durch die Stille. Der Boden ist uneben, übersät mit zerbrochenen Waffen, zerrissenen Seilen… und Körpern.</text:span></text:p>
      <text:p text:style-name="Text_20_body"><text:span text:style-name="Emphasis">Dutzende Leichen liegen verstreut, als wären sie in einem einzigen, verzweifelten Moment gefallen. Ihre Haut ist blass, fast wächsern, und obwohl sie von tiefen Klauenspuren übersät sind, wirken sie seltsam unversehrt.</text:span></text:p>
      <text:p text:style-name="Text_20_body"><text:span text:style-name="Emphasis">Am Ende des Raumes erhebt sich eine massive Steintür, so groß, dass sie fast die gesamte Wand einnimmt. Vor ihr lehnt der vermisste Piratenkapitän, sein Körper halb aufgerichtet, als hätte er im Sterben noch versucht, die Tür zu erreichen. Seine Augen sind offen, glasig, und starren direkt auf euch.</text:span></text:p>
      <text:p text:style-name="Text_20_body"><text:span text:style-name="Emphasis">Auf der Tür sind mehrere Steinplatten eingelassen — jede mit anderen Symbol, jede leicht verschiebbar. Ein schwaches, bläuliches Leuchten sickert aus den Ritzen zwischen ihnen, als würde etwas dahinter atmen.</text:span></text:p>
      <text:p text:style-name="Text_20_body"><text:span text:style-name="Emphasis">Und dann… glaubt ihr, ein Flüstern zu hören. Ganz leise. Ganz nah. Als würden die Toten im Raum darauf warten, </text:span><text:span text:style-name="Emphasis"><text:span text:style-name="T20">was ihr als nächstes tut</text:span></text:span><text:span text:style-name="Emphasis">.</text:span></text:p>
      <text:p text:style-name="Text_20_body"><text:span text:style-name="Emphasis"/></text:p>
      <text:p text:style-name="Text_20_body"><text:span text:style-name="Emphasis"/></text:p>
      <text:p text:style-name="Text_20_body"><text:soft-page-break/><text:span text:style-name="Emphasis">🧩 </text:span><text:span text:style-name="Emphasis"><text:span text:style-name="Strong_20_Emphasis">Das Tor der Drei Bindungen</text:span></text:span></text:p>
      <text:p text:style-name="Text_20_body"><text:span text:style-name="Emphasis">(Raum 4 – Rätselversion nach deinen Vorgaben)</text:span></text:p>
      <text:p text:style-name="Text_20_body">Über dem Tor steht in tief eingeritzten, alten Zeichen:</text:p>
      <text:p text:style-name="Text_20_body"><text:span text:style-name="Strong_20_Emphasis">„Geboren in den tiefen des Meeres,<text:line-break/>gebunden von Menschen Hand,<text:line-break/>niemals darf er </text:span><text:span text:style-name="Strong_20_Emphasis"><text:span text:style-name="T21">Wiederkehren</text:span></text:span><text:span text:style-name="Strong_20_Emphasis">.“</text:span></text:p>
      <text:p text:style-name="Text_20_body">Darunter befinden sich <text:span text:style-name="Strong_20_Emphasis">drei runde Steinplatten</text:span>, jede mit <text:span text:style-name="Strong_20_Emphasis">fünf Symbolen</text:span>, die gedreht werden können. <text:span text:style-name="T20">Über den Steinplatten befindet sich jeweils ein anderes Symbol.</text:span><text:line-break/>Die Tür öffnet sich nur, wenn <text:span text:style-name="Strong_20_Emphasis">alle drei Platten gleichzeitig</text:span> auf das richtige Symbol ausgerichtet sind.</text:p>
      <text:p text:style-name="Text_20_body">🔹 <text:span text:style-name="Strong_20_Emphasis">Platte 1 – „Geboren in den tiefen des Meeres“</text:span></text:p>
      <text:p text:style-name="Text_20_body"><text:span text:style-name="Strong_20_Emphasis">Thema:</text:span> Ursprung, Geburt, Meer</text:p>
      <text:p text:style-name="P32">Symbol über der Platte:</text:p>
      <text:p text:style-name="P33">Ein dunkler Schatten eines Ungeheuers</text:p>
      <text:p text:style-name="Text_20_body"><text:span text:style-name="Strong_20_Emphasis">Symbole auf der Platte:</text:span></text:p>
      <text:list text:style-name="L9">
        <text:list-item>
          <text:p text:style-name="P34">🌊 <text:span text:style-name="Strong_20_Emphasis"><text:span text:style-name="T17">Welle</text:span></text:span> </text:p>
        </text:list-item>
        <text:list-item>
          <text:p text:style-name="P34">🪨 Fels </text:p>
        </text:list-item>
        <text:list-item>
          <text:p text:style-name="P34">🐚 Muschel </text:p>
        </text:list-item>
        <text:list-item>
          <text:p text:style-name="P34">🌀 Strudel </text:p>
        </text:list-item>
        <text:list-item>
          <text:p text:style-name="P35">🌑 <text:span text:style-name="T3">Dunkelheit</text:span><text:span text:style-name="T17"> </text:span></text:p>
        </text:list-item>
      </text:list>
      <text:p text:style-name="Text_20_body"><text:span text:style-name="Strong_20_Emphasis">Lösung:</text:span></text:p>
      <text:p text:style-name="P36"><text:span text:style-name="Strong_20_Emphasis">🌊 </text:span><text:span text:style-name="Strong_20_Emphasis"><text:span text:style-name="T17">Welle</text:span></text:span><text:span text:style-name="Strong_20_Emphasis"> <text:s/></text:span><text:line-break/>→ Das Wesen (der Splitter / der Hüter) stammt aus de<text:span text:style-name="T21">n Tiefen </text:span><text:span text:style-name="T20">des Meeres</text:span>.<text:line-break/>→ Die Inschrift sagt klar: <text:span text:style-name="Emphasis">„Geboren in den tiefen des Meeres“.</text:span></text:p>
      <text:p text:style-name="Text_20_body">🔹 <text:span text:style-name="Strong_20_Emphasis">Platte 2 – „Gebunden von Menschen Hand“</text:span></text:p>
      <text:p text:style-name="Text_20_body"><text:span text:style-name="Strong_20_Emphasis">Thema:</text:span> Fessel, Bann, Kontrolle</text:p>
      <text:p text:style-name="P32">Symbol über der Platte:</text:p>
      <text:p text:style-name="P33">Ein Ungeheuers</text:p>
      <text:p text:style-name="Text_20_body"><text:span text:style-name="Strong_20_Emphasis">Symbole auf der Platte:</text:span></text:p>
      <text:list text:style-name="L10">
        <text:list-item>
          <text:p text:style-name="P37">🔗 <text:span text:style-name="Strong_20_Emphasis">Kette</text:span> </text:p>
        </text:list-item>
        <text:list-item>
          <text:p text:style-name="P37">⚓ Anker </text:p>
        </text:list-item>
        <text:list-item>
          <text:p text:style-name="P37">🪬 Schutzsymbol </text:p>
        </text:list-item>
        <text:list-item>
          <text:p text:style-name="P37">🗝 Schlüssel </text:p>
        </text:list-item>
        <text:list-item>
          <text:p text:style-name="P38">🧱 Mauer </text:p>
        </text:list-item>
      </text:list>
      <text:p text:style-name="Text_20_body"><text:span text:style-name="Strong_20_Emphasis">Lösung:</text:span></text:p>
      <text:p text:style-name="Text_20_body"><text:soft-page-break/><text:span text:style-name="Strong_20_Emphasis">🔗 Kette</text:span><text:line-break/>→ Die Menschen haben das Wesen gebunden, gefesselt, versiegelt.<text:line-break/>→ Die Kette ist das klarste Symbol für „gebunden von Menschen Hand“.</text:p>
      <text:p text:style-name="Text_20_body">🔹 <text:span text:style-name="Strong_20_Emphasis">Platte 3 – „Niemals darf er </text:span><text:span text:style-name="Strong_20_Emphasis"><text:span text:style-name="T21">Wiederkehren</text:span></text:span><text:span text:style-name="Strong_20_Emphasis">“</text:span></text:p>
      <text:p text:style-name="Text_20_body"><text:span text:style-name="Strong_20_Emphasis">Thema:</text:span> Tod, Rückkehr, Verbotene Erneuerung</text:p>
      <text:p text:style-name="P32">Symbol über der Platte:</text:p>
      <text:p text:style-name="P33">Eine Hand die etwas nach unten drückt</text:p>
      <text:p text:style-name="Text_20_body"><text:span text:style-name="Strong_20_Emphasis">Symbole auf der Platte:</text:span></text:p>
      <text:list text:style-name="L11">
        <text:list-item>
          <text:p text:style-name="P39">☀️ Sonne </text:p>
        </text:list-item>
        <text:list-item>
          <text:p text:style-name="P39">🌱 Spross </text:p>
        </text:list-item>
        <text:list-item>
          <text:p text:style-name="P39">🔥 Flamme </text:p>
        </text:list-item>
        <text:list-item>
          <text:p text:style-name="P39">💀 <text:span text:style-name="T22">E</text:span>in Schädel mit aufsteigendem Licht</text:p>
        </text:list-item>
        <text:list-item>
          <text:p text:style-name="P40">🕳 Abgrund </text:p>
        </text:list-item>
      </text:list>
      <text:p text:style-name="Text_20_body"><text:span text:style-name="Strong_20_Emphasis">Lösung:</text:span></text:p>
      <text:p text:style-name="Text_20_body"><text:span text:style-name="Strong_20_Emphasis">💀 Wiederauferstehungssymbol</text:span><text:line-break/>→ Die Inschrift warnt ausdrücklich davor, dass <text:span text:style-name="Emphasis">„er niemals </text:span><text:span text:style-name="Emphasis"><text:span text:style-name="T21">wiederkehren</text:span></text:span><text:span text:style-name="Emphasis"> darf“</text:span>.<text:line-break/>→ Die Spieler müssen das Symbol der Wiederauferstehung wählen, um zu zeigen, dass sie das Verbot verstanden haben.</text:p>
      <text:p text:style-name="Text_20_body">⚠️ <text:span text:style-name="Strong_20_Emphasis">Scheitern am Rätsel</text:span></text:p>
      <text:list text:style-name="L12">
        <text:list-item>
          <text:p text:style-name="P41">Ein kalter Windstoß fährt durch den Raum. </text:p>
        </text:list-item>
        <text:list-item>
          <text:p text:style-name="P41">Die Augen der Piratenleichen beginnen bläulich zu glimmen. </text:p>
        </text:list-item>
        <text:list-item>
          <text:p text:style-name="P42">Die Geister der Piraten fahren in die Körper. </text:p>
        </text:list-item>
      </text:list>
      <text:p text:style-name="Text_20_body"><text:span text:style-name="Strong_20_Emphasis">Mechanik:</text:span></text:p>
      <text:list text:style-name="L13">
        <text:list-item>
          <text:p text:style-name="P43"><text:span text:style-name="Strong_20_Emphasis">1. Fehler:</text:span> 1W4 Zombie-Piraten erheben sich. </text:p>
        </text:list-item>
        <text:list-item>
          <text:p text:style-name="P44"><text:span text:style-name="Strong_20_Emphasis">2. Fehler:</text:span> 1W6 Zombie-Piraten erheben sich. </text:p>
        </text:list-item>
        <text:list-item>
          <text:p text:style-name="P45"><text:span text:style-name="Strong_20_Emphasis">3. Fehler:</text:span> Der <text:span text:style-name="Strong_20_Emphasis">Kapitän</text:span> erhebt sich als Untoter (Mini-Boss). </text:p>
        </text:list-item>
        <text:list-item>
          <text:p text:style-name="P46">Kommen die Spiele auf die Idee die Leichen der Piraten zu zerstückeln entsteht bei einem Fehler statt Zombies ein Fleischgolem und greift an</text:p>
        </text:list-item>
      </text:list>
      <text:p text:style-name="Text_20_body">Wenn die Spieler das Rätsel lösen, fallen alle Leichen wieder leblos zu Boden.</text:p>
      <text:p text:style-name="Text_20_body"><text:span text:style-name="Emphasis"/></text:p>
      <text:p text:style-name="P1"><text:span text:style-name="Strong_20_Emphasis">Raum 5 – Der Korridor der Klagenden</text:span></text:p>
      <text:p text:style-name="Text_20_body"><text:span text:style-name="Emphasis">Psychische Bedrohung</text:span></text:p>
      <text:list text:style-name="L14">
        <text:list-item>
          <text:p text:style-name="P47">Die Wände sind mit <text:span text:style-name="T23">geisterhaften</text:span> Gesichtern bedeckt, alle mit offenen Mündern. </text:p>
        </text:list-item>
        <text:list-item>
          <text:p text:style-name="P47">Ein leises Wimmern <text:span text:style-name="T23">und Flüstern </text:span>erfüllt den Gang. </text:p>
        </text:list-item>
        <text:list-item>
          <text:p text:style-name="P47"><text:span text:style-name="Strong_20_Emphasis">Gefahr:</text:span> </text:p>
          <text:list>
            <text:list-item>
              <text:p text:style-name="P47">WIS‑Save DC 1<text:span text:style-name="T23">1</text:span> <text:span text:style-name="T23">(+2 pro Runde in diesem Raum)</text:span>→ <text:span text:style-name="Strong_20_Emphasis">Bei Misserfolg (würfle 1W4):</text:span></text:p>
            </text:list-item>
          </text:list>
        </text:list-item>
      </text:list>
      <text:list text:style-name="L15">
        <text:list-item>
          <text:list>
            <text:list-item>
              <text:list>
                <text:list-item>
                  <text:p text:style-name="P48"><text:span text:style-name="Strong_20_Emphasis">Flüsternde Zweifel:</text:span> −1 auf den nächsten Angriff oder Save. </text:p>
                </text:list-item>
                <text:list-item>
                  <text:p text:style-name="P48"><text:span text:style-name="Strong_20_Emphasis">Kopfschmerz der Tiefe:</text:span> 1W4 psychischer Schaden. </text:p>
                </text:list-item>
                <text:list-item>
                  <text:p text:style-name="P48"><text:soft-page-break/><text:span text:style-name="Strong_20_Emphasis">Verlorene Gedanken:</text:span> Der SC verliert für 1 Runde seine Aktion. </text:p>
                </text:list-item>
                <text:list-item>
                  <text:p text:style-name="P49"><text:span text:style-name="Strong_20_Emphasis">Stimmen der Toten:</text:span> Der SC hört eine klare Botschaft (z. B. „<text:span text:style-name="T23">Verhindert sein erwachen</text:span>…“), ist 1 Runde verängstigt. </text:p>
                </text:list-item>
              </text:list>
            </text:list-item>
          </text:list>
        </text:list-item>
      </text:list>
      <text:p text:style-name="P50"><text:span text:style-name="Emphasis"/></text:p>
      <text:p text:style-name="P1"><text:span text:style-name="Emphasis">🌑 </text:span><text:span text:style-name="Emphasis"><text:span text:style-name="Strong_20_Emphasis">Vorlesetext</text:span></text:span></text:p>
      <text:p text:style-name="Text_20_body"><text:span text:style-name="Emphasis">Hinter der schweren Steintür öffnet sich ein langer, schmaler Gang. Die Luft ist kälter hier, schwerer. Eure Schritte hallen dumpf wider — doch das Echo klingt… falsch. Verzerrt. Als würde etwas mitsprechen.</text:span></text:p>
      <text:p text:style-name="Text_20_body"><text:span text:style-name="Emphasis">An den Wänden und selbst an der Decke zeichnen sich geisterhafte Gesichter ab, halb aus dem Stein geformt, halb aus Nebel. Manche wirken verzerrt vor Schmerz, andere starren mit leeren Augen in die Dunkelheit. Ihre Münder sind geöffnet, als würden sie schreien — doch was ihr hört, ist ein Flüstern. Ein endloses, klagendes Wispern, das sich wie kaltes Wasser in eure Ohren schleicht.</text:span></text:p>
      <text:p text:style-name="Text_20_body"><text:span text:style-name="Emphasis">Die Stimmen überlagern sich, unverständlich und doch voller Verzweiflung. Manchmal glaubt ihr einzelne Worte zu erkennen: „Hilfe…“, „Warum…?“, „Nicht vergessen…“, „Zu tief…“, „Zu spät…“</text:span></text:p>
      <text:p text:style-name="Text_20_body"><text:span text:style-name="Emphasis">Je weiter ihr geht, desto lauter wird das Flüstern — und desto schwerer fällt es, eure eigenen Gedanken von den Stimmen zu trennen.</text:span></text:p>
      <text:p text:style-name="Text_20_body"><text:span text:style-name="Emphasis"/></text:p>
      <text:p text:style-name="Text_20_body"><text:span text:style-name="Strong_20_Emphasis">Raum 6 – Die Kammer der Zersplitterten Wahrheit</text:span></text:p>
      <text:p text:style-name="Text_20_body"><text:span text:style-name="Emphasis">Illusionen &amp; Visionen</text:span></text:p>
      <text:list xml:id="list3391739398" text:style-name="L16">
        <text:list-item>
          <text:p text:style-name="P51">Ein kreisrunder Raum mit einem stillen Wasserbecken. </text:p>
        </text:list-item>
        <text:list-item>
          <text:p text:style-name="P51">Wer hineinsieht, <text:span text:style-name="T24">sieht vage Bilder von möglichen Zunkunftssträngen über</text:span></text:p>
        </text:list-item>
      </text:list>
      <text:list text:style-name="L17">
        <text:list-item>
          <text:list>
            <text:list-item>
              <text:p text:style-name="P52">das erwachen des Levithan, die Veränderung der Welt, aber auch große Macht</text:p>
            </text:list-item>
            <text:list-item>
              <text:p text:style-name="P52">das Ritual, die <text:span text:style-name="T25">V</text:span>erfluchung der Mannschaft, aber auch <text:span text:style-name="T25">U</text:span>nsterblichkeit</text:p>
            </text:list-item>
          </text:list>
        </text:list-item>
      </text:list>
      <text:list text:continue-list="list3391739398" text:style-name="L16">
        <text:list-item>
          <text:p text:style-name="P51"><text:span text:style-name="Strong_20_Emphasis">Mechanik:</text:span> </text:p>
          <text:list>
            <text:list-item>
              <text:p text:style-name="P51">WIS‑Save DC 13 → bei Misserfolg 1d4 psychischer Schaden. </text:p>
            </text:list-item>
          </text:list>
        </text:list-item>
      </text:list>
      <text:p text:style-name="Text_20_body"><text:span text:style-name="Emphasis"/></text:p>
      <text:p text:style-name="P1"><text:span text:style-name="Emphasis">🌑 </text:span><text:span text:style-name="Emphasis"><text:span text:style-name="Strong_20_Emphasis">Vorlesetext – Raum 6: Die Kammer der Zersplitterten Wahrheit</text:span></text:span></text:p>
      <text:p text:style-name="Text_20_body"><text:span text:style-name="Emphasis">Der Gang öffnet sich zu einer runden Kammer, deren Wände glatt und feucht glänzen, als wären sie aus poliertem Obsidian. In der Mitte des Raumes liegt ein flaches Wasserbecken, kaum knöcheltief, doch die Oberfläche ist so vollkommen ruhig, dass sie wie ein schwarzer Spiegel wirkt. Ein bläuliches Schimmern pulsiert tief darin, als würde etwas unter der Oberfläche atmen.</text:span></text:p>
      <text:p text:style-name="Text_20_body"><text:span text:style-name="Emphasis">Die Luft ist still. Kein Tropfen fällt, kein Wind bewegt sich. Und doch spürt ihr, wie etwas euch beobachtet — nicht aus der Dunkelheit, sondern aus dem Wasser selbst. Als ihr euch nähert, beginnt die Oberfläche leicht zu flimmern… und zeigt nicht euer Spiegelbild, sondern etwas anderes.</text:span></text:p>
      <text:p text:style-name="P1"><text:span text:style-name="Emphasis"/></text:p>
      <text:p text:style-name="P1"><text:span text:style-name="Emphasis"/></text:p>
      <text:p text:style-name="P1"><text:soft-page-break/><text:span text:style-name="Emphasis">🌑 </text:span><text:span text:style-name="Emphasis"><text:span text:style-name="Strong_20_Emphasis">Vorlesetext – Vision </text:span></text:span><text:span text:style-name="Strong_20_Emphasis"><text:span text:style-name="T24">Erwachen des Leviathan</text:span></text:span></text:p>
      <text:p text:style-name="Text_20_body"><text:span text:style-name="Emphasis">Die Wasseroberfläche wird schwarz wie Tinte. Dann bricht ein gleißender Riss hindurch — ein Splitter aus Licht, der in euren Augen brennt. Ihr seht eure eigene Hand danach greifen… und dann zerbricht der Splitter.</text:span></text:p>
      <text:p text:style-name="Text_20_body"><text:span text:style-name="Emphasis">Ein scharfer, klaffender Klang erfüllt die Kammer, als würde die Welt selbst reißen. Der Himmel über euch verdunkelt sich augenblicklich, als hätte jemand die Sonne ausgelöscht. Wolken türmen sich auf, schwarz und schwer, und Blitze zucken darin wie zuckende Adern.</text:span></text:p>
      <text:p text:style-name="Text_20_body"><text:span text:style-name="Emphasis">Unter euren Füßen beginnt die Erde zu beben. Erst ein Zittern, dann ein tiefes, grollendes Beben, das sich durch Stein und Knochen frisst. Risse ziehen sich durch den Boden, und aus ihnen steigt ein kalter Nebel auf.</text:span></text:p>
      <text:p text:style-name="Text_20_body"><text:span text:style-name="Emphasis">Dann seht ihr das Meer. Endlos. Schwarz. Und dort, weit draußen, erhebt sich ein Schatten. Ein gewaltiger, furchteinflößender Schatten, größer als jedes Schiff, größer als jede Klippe. Er steigt langsam aus der Tiefe empor, als würde ein uraltes Wesen nach unendlichem Schlaf erwachen. Ihr erkennt keine klare Form — nur Augen, die wie kalte Sterne brennen, und eine Silhouette, die die See selbst erzittern lässt.</text:span></text:p>
      <text:p text:style-name="Text_20_body"><text:span text:style-name="Emphasis">Und dann… richtet sich der Blick dieses Wesens auf euch.</text:span></text:p>
      <text:p text:style-name="Text_20_body"><text:span text:style-name="Emphasis">Das Wasser im Becken pulsiert. Ein Schwall aus bläulichem Licht schießt daraus hervor und umhüllt euch. Ihr spürt Macht — rohe, ungezähmte Macht — in eurem Inneren aufsteigen. Sie ist kalt wie die Tiefe, schwer wie das Meer, und sie flüstert euch zu, dass ihr auserwählt seid. Auserwählt, zu zerstören… oder zu bewahren.</text:span></text:p>
      <text:p text:style-name="Text_20_body"><text:span text:style-name="Emphasis">Die Vision endet abrupt. Das Wasser wird wieder still. Doch das Gefühl der Macht bleibt — wie ein Echo, das nicht verklingen will.</text:span></text:p>
      <text:p text:style-name="P1"><text:span text:style-name="Emphasis"/></text:p>
      <text:p text:style-name="P1"><text:span text:style-name="Emphasis">🌑 </text:span><text:span text:style-name="Emphasis"><text:span text:style-name="Strong_20_Emphasis">Vorlesetext – Vision </text:span></text:span><text:span text:style-name="Emphasis"><text:span text:style-name="Strong_20_Emphasis"><text:span text:style-name="T26">Verfluchte Crew</text:span></text:span></text:span></text:p>
      <text:p text:style-name="Text_20_body"><text:span text:style-name="Emphasis">Die Wasseroberfläche wird milchig und beginnt zu wirbeln, als würde etwas Unsichtbares darin kreisen. Dann wird das Becken klar — so klar, dass ihr glaubt, direkt in eine andere Welt zu blicken.</text:span></text:p>
      <text:p text:style-name="Text_20_body"><text:span text:style-name="Emphasis">Ihr seht euch selbst. Ihr steht in einer gewaltigen Kammer aus schwarzem Stein. Vor euch schwebt der Splitter der Tiefe, pulsierend wie ein Herz. Einer von euch hebt die Perle — und legt sie in die steinerne Schale. Ein leises Klicken, ein Atemzug der Erleichterung… und der Splitter löst sich aus seinem Bann.</text:span></text:p>
      <text:p text:style-name="Text_20_body"><text:span text:style-name="Emphasis">Doch nicht in euren Händen.</text:span></text:p>
      <text:p text:style-name="Text_20_body"><text:span text:style-name="Emphasis">Kapitän Rauthorn tritt aus den Schatten, bleich, halb verwest, aber seine Augen brennen vor triumphierender Gier. Er hält den Splitter hoch, und das blaue Licht darin wird heller, schärfer, hungriger. Das Licht schneidet durch die Kammer wie eine Klinge.</text:span></text:p>
      <text:p text:style-name="Text_20_body"><text:span text:style-name="Emphasis">Dann seht ihr </text:span><text:span text:style-name="Emphasis"><text:span text:style-name="T25">wieder</text:span></text:span><text:span text:style-name="Emphasis"> euch selbst — diesmal kniend, um einen Kreis aus Salz und Blut. Eure Hände sind rot, der Boden unter euch dunkel getränkt. Ihr sprecht Worte, die nicht eure sind, Worte, die wie kaltes Wasser über eure Zungen laufen. Der Splitter schwebt über euch, und jeder Schlag seines Lichtes zieht etwas aus euch heraus.</text:span></text:p>
      <text:p text:style-name="Text_20_body"><text:span text:style-name="Emphasis">Etwas Wichtiges. Etwas, das nicht zurückkehrt.</text:span></text:p>
      <text:p text:style-name="Text_20_body"><text:soft-page-break/><text:span text:style-name="Emphasis">Ihr seht eure eigenen Schatten, wie sie sich vom Boden lösen… und verschwinden. Eure Augen werden leer, farblos, wie ausgehöhlte Muscheln. Eure Stimmen verstummen. Und dann steht ihr auf — langsam, mechanisch, wie Marionetten, deren Fäden von der Tiefe selbst geführt werden.</text:span></text:p>
      <text:p text:style-name="Text_20_body"><text:span text:style-name="Emphasis">Ihr lebt noch. Aber ihr seid nicht mehr ihr selbst.</text:span></text:p>
      <text:p text:style-name="Text_20_body"><text:span text:style-name="Emphasis">Ihr seid unsterblich.<text:line-break/>Unsterblich… und verloren.</text:span></text:p>
      <text:p text:style-name="Text_20_body"><text:span text:style-name="Emphasis">Die Vision bricht ab. Das Wasser wird wieder schwarz. Doch für einen Moment fühlt ihr eine Kälte in eurer Brust — als hätte etwas nach eurer Seele gegriffen…</text:span></text:p>
      <text:p text:style-name="P1"><text:span text:style-name="Emphasis"/></text:p>
      <text:p text:style-name="P1"><text:span text:style-name="Emphasis"><text:span text:style-name="Strong_20_Emphasis">Raum </text:span></text:span><text:span text:style-name="Emphasis"><text:span text:style-name="Strong_20_Emphasis"><text:span text:style-name="T27">7</text:span></text:span></text:span><text:span text:style-name="Emphasis"><text:span text:style-name="Strong_20_Emphasis"> – Die Kammer des Splitters</text:span></text:span></text:p>
      <text:p text:style-name="Text_20_body"><text:span text:style-name="Emphasis">Finale</text:span></text:p>
      <text:list text:style-name="L18">
        <text:list-item>
          <text:p text:style-name="P53">Ein gewaltiger, natürlicher Dom aus schwarzem Stein. </text:p>
        </text:list-item>
        <text:list-item>
          <text:p text:style-name="P53">In der Mitte schwebt der <text:span text:style-name="Strong_20_Emphasis">Splitter der Tiefe</text:span>, gehalten von einer steinernen Schale. </text:p>
        </text:list-item>
        <text:list-item>
          <text:p text:style-name="P53">Das Licht pulsiert wie ein Herzschlag. </text:p>
        </text:list-item>
        <text:list-item>
          <text:p text:style-name="P53"><text:span text:style-name="Strong_20_Emphasis">Mechanik:</text:span> </text:p>
          <text:list>
            <text:list-item>
              <text:p text:style-name="P53">Wird der Splitter genommen, ohne die Perle zu platzieren → </text:p>
              <text:list>
                <text:list-item>
                  <text:p text:style-name="P53">Der <text:span text:style-name="Strong_20_Emphasis">Hüter der Tiefe</text:span> erwacht (ein massiver Geister‑Leviathan‑Schatten).</text:p>
                </text:list-item>
                <text:list-item>
                  <text:p text:style-name="P54">Der Hüter der Tiefe verhindert das der Splitter den Raum verlassen kann</text:p>
                </text:list-item>
                <text:list-item>
                  <text:p text:style-name="P54">W4 Schaden pro Runde durch Angriffe des Hüters</text:p>
                </text:list-item>
              </text:list>
            </text:list-item>
            <text:list-item>
              <text:p text:style-name="P55">Wird der Splitter genommen, <text:span text:style-name="T28">wenn </text:span>die Perle eingesetzt <text:span text:style-name="T28">ist</text:span>→ </text:p>
              <text:list>
                <text:list-item>
                  <text:p text:style-name="P55">Der <text:span text:style-name="Strong_20_Emphasis">Hüter der Tiefe</text:span> erwacht (ein massiver Geister‑Leviathan‑Schatten).</text:p>
                </text:list-item>
                <text:list-item>
                  <text:p text:style-name="P56">Der Hüter nimmt die Perle an sich und verschwindet wieder</text:p>
                </text:list-item>
                <text:list-item>
                  <text:p text:style-name="P53">Der Splitter kann sicher entnommen werden </text:p>
                </text:list-item>
              </text:list>
            </text:list-item>
          </text:list>
        </text:list-item>
        <text:list-item>
          <text:p text:style-name="P57"><text:span text:style-name="Strong_20_Emphasis">Loot:</text:span> Der Splitter der Tiefe </text:p>
        </text:list-item>
      </text:list>
      <text:p text:style-name="P1"><text:span text:style-name="Emphasis"/></text:p>
      <text:p text:style-name="P1"><text:span text:style-name="Emphasis">🌊💀 </text:span><text:span text:style-name="Emphasis"><text:span text:style-name="Strong_20_Emphasis">Raum 7 – Die Lagerstätte des Splitters</text:span></text:span></text:p>
      <text:p text:style-name="Text_20_body">🌑 <text:span text:style-name="Strong_20_Emphasis">Vorlesetext</text:span></text:p>
      <text:p text:style-name="Text_20_body"><text:span text:style-name="Emphasis">Der Gang öffnet sich zu einer gewaltigen Halle aus schwarzem Stein. Die Wände sind glatt wie Glas, doch durchzogen von feinen, bläulich schimmernden Adern, die im Takt eines langsamen Herzschlags pulsieren. Die Luft ist schwer und still, als würde der Raum selbst den Atem anhalten.</text:span></text:p>
      <text:p text:style-name="Text_20_body"><text:span text:style-name="Emphasis">In der Mitte erhebt sich ein massiver Altar, roh behauen und dennoch von unheimlicher Präzision. Über ihm schwebt der Splitter der Tiefe — ein scharfkantiges Fragment aus blauem Licht, das sich wie flüssige Energie windet. Er dreht sich langsam um die eigene Achse, und jeder seiner Lichtschläge wirft lange, verzerrte Schatten an die Wände.</text:span></text:p>
      <text:p text:style-name="Text_20_body"><text:span text:style-name="Emphasis">Unter dem Splitter ruht eine steinerne Schale </text:span><text:span text:style-name="Emphasis"><text:span text:style-name="T28">mit Wasser</text:span></text:span><text:span text:style-name="Emphasis">, </text:span><text:span text:style-name="Emphasis"><text:span text:style-name="T28">von</text:span></text:span><text:span text:style-name="Emphasis"> </text:span><text:span text:style-name="Emphasis"><text:span text:style-name="T28">einer </text:span></text:span><text:span text:style-name="Emphasis">Salzkruste überzogen </text:span><text:span text:style-name="Emphasis"><text:span text:style-name="T28">und</text:span></text:span><text:span text:style-name="Emphasis"> </text:span><text:span text:style-name="Emphasis"><text:span text:style-name="T28">gezeichnet von</text:span></text:span><text:span text:style-name="Emphasis"> dunklen Flecken. Sie wirkt alt… älter als der Tempel selbst. Ein kalter Wind streicht durch den Raum, obwohl es keine Öffnungen gibt. Er trägt den Geruch von tiefem Wasser und etwas… uraltem.</text:span></text:p>
      <text:p text:style-name="Text_20_body"><text:soft-page-break/><text:span text:style-name="Emphasis">Als ihr euch dem Altar nähert, beginnt der Splitter heller zu leuchten — als würde er euch erkennen.</text:span></text:p>
      <text:p text:style-name="P1"><text:span text:style-name="Emphasis"/></text:p>
      <text:p text:style-name="P1"><text:span text:style-name="Emphasis">🌊💀 </text:span><text:span text:style-name="Emphasis"><text:span text:style-name="Strong_20_Emphasis">Vorlesetext – Das Erwachen des Hüters der Tiefe</text:span></text:span></text:p>
      <text:p text:style-name="Text_20_body"><text:span text:style-name="Emphasis">In dem Moment, in dem eure Finger den Splitter berühren, verändert sich der Raum. Das blaue Licht des Fragments flackert — erst wie ein Atemzug, dann wie ein Herzschlag. Die Wände beginnen zu pulsieren, als würden sie lebendig werden. Ein tiefes, grollendes Dröhnen steigt aus dem Boden auf, so mächtig, dass eure Knie nachgeben.</text:span></text:p>
      <text:p text:style-name="Text_20_body"><text:span text:style-name="Emphasis">Das Wasser in der Schale kocht plötzlich, obwohl es eiskalt bleibt. Dunkle Nebelschwaden schießen daraus hervor und kriechen über den Altar, über den Boden, über eure Füße. Die Temperatur fällt schlagartig, als würde die Tiefe selbst in den Raum eindringen.</text:span></text:p>
      <text:p text:style-name="Text_20_body"><text:span text:style-name="Emphasis">Dann reißt die Luft auf.</text:span></text:p>
      <text:p text:style-name="Text_20_body"><text:span text:style-name="Emphasis">Ein gewaltiger Schatten erhebt sich aus dem Nichts — eine Form aus Wasser, Nebel und uraltem Zorn. Er füllt die Halle, ohne sie zu berühren, ein Wesen ohne klare Gestalt, doch mit Augen, die wie zwei kalte Sterne brennen.</text:span></text:p>
      <text:p text:style-name="Text_20_body"><text:span text:style-name="Emphasis">Ein Laut erfüllt den Raum. Kein Schrei. Kein Brüllen. Sondern das Knarren eines uralten Schiffsrumpfes, der in der Tiefe bricht. Ein Laut, der euch bis ins Mark trifft.</text:span></text:p>
      <text:p text:style-name="Text_20_body"><text:span text:style-name="Emphasis">Der Raum bebt, das Licht des Splitters wird grell, und der Schatten beginnt sich zu bewegen… direkt auf euch zu.</text:span></text:p>
      <text:p text:style-name="P1"><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1T21:04:56.512225300</meta:creation-date>
    <dc:date>2026-01-31T09:36:36.110152400</dc:date>
    <meta:editing-duration>PT2H12M1S</meta:editing-duration>
    <meta:editing-cycles>21</meta:editing-cycles>
    <meta:generator>LibreOffice/25.2.7.2$Windows_X86_64 LibreOffice_project/5cbfd1ab6520636bb5f7b99185aa69bd7456825d</meta:generator>
    <meta:document-statistic meta:table-count="1" meta:image-count="0" meta:object-count="0" meta:page-count="13" meta:paragraph-count="271" meta:word-count="4178" meta:character-count="26320" meta:non-whitespace-character-count="22357"/>
  </office:meta>
</office:document-meta>
</file>